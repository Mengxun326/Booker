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4pt" officeooo:rsid="00124657" officeooo:paragraph-rsid="00124657" style:font-size-asian="21pt" style:font-size-complex="24pt"/>
    </style:style>
    <style:style style:name="P2" style:family="paragraph" style:parent-style-name="Standard">
      <style:text-properties style:font-name="Times New Roman"/>
    </style:style>
    <style:style style:name="P3" style:family="paragraph" style:parent-style-name="Standard">
      <style:text-properties style:font-name="Times New Roman" officeooo:rsid="00124657" officeooo:paragraph-rsid="00124657"/>
    </style:style>
    <style:style style:name="P4" style:family="paragraph" style:parent-style-name="Standard">
      <style:text-properties style:font-name="Times New Roman" officeooo:paragraph-rsid="00124657"/>
    </style:style>
    <style:style style:name="T1" style:family="text">
      <style:text-properties officeooo:rsid="0013de01"/>
    </style:style>
    <style:style style:name="T2" style:family="text">
      <style:text-properties officeooo:rsid="001246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er – Sample PDF</text:p>
      <text:p text:style-name="P2"/>
      <text:p text:style-name="P3">Okay. This is just a sample PDF for Booker tests. If you want to reuse it for your own tests of Booker, so, go on, it is done for that. I just used a Lorem Ipsum generator (<text:a xlink:type="simple" xlink:href="https://www.lipsum.com/" text:style-name="Internet_20_link" text:visited-style-name="Visited_20_Internet_20_Link">https://www.lipsum.com/</text:a>) to generate the content of this PDF. Feel free to edit the document that was used for this PDF (sample data/sources<text:span text:style-name="T1">) if you need more or less pages, and other datas.</text:span></text:p>
      <text:p text:style-name="P3"/>
      <text:p text:style-name="P3"><text:s/>Lorem ipsum dolor sit amet, consectetur adipiscing elit. Pellentesque tellus ex, molestie eget placerat id, rhoncus aliquet quam. Nullam facilisis bibendum pulvinar. Cras tempus enim a blandit faucibus. Donec malesuada nunc ac elit placerat consectetur. Nullam tempor urna eget tortor scelerisque pretium. Vestibulum laoreet metus ut vehicula tincidunt. Pellentesque libero quam, accumsan sit amet metus sit amet, laoreet maximus lorem. Phasellus sed lacinia ex, in facilisis neque. Nulla porta pulvinar dolor, sed ullamcorper nisi.</text:p>
      <text:p text:style-name="P3"/>
      <text:p text:style-name="P3">Nullam odio nunc, dictum at purus vel, tincidunt tincidunt elit. Aliquam faucibus ante est, sed condimentum velit pretium et. Fusce nibh erat, maximus et hendrerit quis, vestibulum a nulla. Duis at rutrum eros. Nunc vel rutrum tortor. Vivamus dignissim velit ut dapibus malesuada. Vestibulum fringilla quam nunc, sed bibendum lectus cursus ut. Vivamus semper condimentum justo, a ultrices ipsum pharetra et. Morbi in dui at leo porttitor iaculis id sit amet sapien. Cras condimentum nisl velit, lobortis maximus quam vehicula non. In rutrum lacus vel blandit eleifend. Vestibulum sagittis, nibh sagittis ultrices tempor, elit quam tristique tortor, sed porttitor dui nunc id ipsum. Pellentesque scelerisque pellentesque diam nec consequat. Ut sit amet aliquet arcu, et blandit lorem.</text:p>
      <text:p text:style-name="P3"/>
      <text:p text:style-name="P3">Lorem ipsum dolor sit amet, consectetur adipiscing elit. Suspendisse eget sem accumsan, interdum augue sit amet, convallis felis. Pellentesque non turpis blandit, aliquet sem ac, varius erat. Nam finibus, lorem id pretium auctor, nunc felis pharetra risus, quis dignissim arcu enim semper neque. Mauris eleifend tellus at tortor condimentum consectetur. Curabitur sodales ultrices justo, vel laoreet justo lacinia molestie. Donec congue dictum feugiat. Ut auctor laoreet magna, eu auctor ipsum. Sed tempus viverra est, sed euismod velit luctus ut.</text:p>
      <text:p text:style-name="P3"/>
      <text:p text:style-name="P3">Sed condimentum aliquet justo, vitae pulvinar velit tempor ac. Nam at dui condimentum odio gravida dapibus. Fusce lacus est, dapibus eu enim et, faucibus malesuada elit. Mauris ex nisi, ullamcorper feugiat dapibus vel, vestibulum vel urna. Curabitur tempus risus sem, eget mollis leo sodales eu. Maecenas nibh lacus, facilisis sed sodales et, consequat vitae urna. Fusce eros eros, ultrices nec finibus at, gravida ac elit. Suspendisse in condimentum lacus.</text:p>
      <text:p text:style-name="P3"/>
      <text:p text:style-name="P3">Quisque ornare tempus neque, a fringilla erat vulputate ac. Phasellus consequat tortor in lectus sodales tempus. Sed semper vestibulum magna nec ornare. Sed ullamcorper tellus ex, eget tincidunt nulla tempor a. Praesent et venenatis velit, ut vestibulum nulla. Praesent venenatis turpis ipsum, sit amet eleifend lacus hendrerit at. Phasellus at ornare lorem, sed viverra felis. Ut iaculis, arcu vitae dictum commodo, purus felis mattis arcu, sit amet faucibus augue lorem sit amet diam. Cras eu pellentesque nulla, non facilisis erat. Nam congue a quam sit amet malesuada.</text:p>
      <text:p text:style-name="P3"/>
      <text:p text:style-name="P3">Pellentesque vel nisl volutpat, pulvinar velit eget, sollicitudin mauris. Nullam blandit mi quam, sed facilisis est dapibus at. Nunc feugiat id turpis non semper. Sed et elit sit amet nibh posuere ornare vitae sed nibh. Sed dignissim pulvinar suscipit. Maecenas bibendum leo vel pellentesque eleifend. Vivamus pellentesque lacus ut elementum tincidunt. Fusce est risus, consectetur vitae commodo at, ultrices sit amet augue.</text:p>
      <text:p text:style-name="P3"/>
      <text:p text:style-name="P3">Cras cursus, ante eu interdum molestie, dolor massa condimentum ante, at facilisis purus nunc vel mi. Donec consectetur metus in mi sodales, eu ultricies quam dapibus. Etiam quis sodales eros. <text:soft-page-break/>Phasellus eget erat felis. Nullam in magna tempus, cursus turpis in, placerat arcu. Curabitur tincidunt nisl sit amet risus congue, at mollis metus egestas. Proin nisi risus, pharetra luctus nibh quis, tincidunt pulvinar nisl. Class aptent taciti sociosqu ad litora torquent per conubia nostra, per inceptos himenaeos. Fusce congue laoreet imperdiet. Pellentesque habitant morbi tristique senectus et netus et malesuada fames ac turpis egestas. Quisque mi tellus, aliquam id aliquet ut, tristique in lectus. Vestibulum ante ipsum primis in faucibus orci luctus et ultrices posuere cubilia curae; Nulla dignissim enim eu nulla dapibus, eget convallis ipsum tempor.</text:p>
      <text:p text:style-name="P3"/>
      <text:p text:style-name="P3">Nam tristique urna et mollis viverra. Donec luctus feugiat orci, non vestibulum sem convallis nec. Suspendisse a hendrerit purus. Curabitur bibendum varius nisi, eget posuere turpis venenatis eget. Pellentesque consectetur non massa et maximus. Ut at laoreet purus, a porta orci. Suspendisse aliquam sapien quis efficitur rhoncus. Morbi mattis massa ut sem tristique pulvinar. Duis venenatis a ligula ut laoreet. Curabitur non purus vitae ante semper tempus. Donec id nibh scelerisque, laoreet quam in, vehicula nisi. Donec vitae diam vel enim imperdiet finibus sed non urna. Aenean eu erat convallis, bibendum justo non, fringilla ante.</text:p>
      <text:p text:style-name="P3"/>
      <text:p text:style-name="P3">Sed eros massa, ullamcorper non tempor eget, pulvinar eu lorem. Curabitur non augue tincidunt, suscipit urna pretium, venenatis dolor. Quisque faucibus ut dolor sit amet cursus. Fusce dictum risus quis nulla tristique, nec ullamcorper ex tempor. Duis tristique ornare quam, nec blandit mauris eleifend a. Ut turpis diam, pharetra in risus mattis, pharetra bibendum lectus. Aliquam mauris dolor, commodo quis scelerisque gravida, porta nec elit. Duis ut viverra ex, sed ultrices elit. Donec quis urna at odio lacinia eleifend. Nam tempus neque at rhoncus rutrum. Nulla accumsan, nunc ut pretium elementum, justo diam laoreet justo, id pulvinar augue leo facilisis lacus. Lorem ipsum dolor sit amet, consectetur adipiscing elit. Quisque sed purus et odio imperdiet varius eu sit amet erat.</text:p>
      <text:p text:style-name="P3"/>
      <text:p text:style-name="P3">Curabitur sed porttitor augue, sit amet volutpat lectus. Proin blandit libero quis odio congue, et feugiat ex blandit. Vivamus ut maximus lacus. Morbi varius vehicula tellus. Quisque sagittis elit in velit sagittis, ac gravida eros consequat. Maecenas non libero mi. Pellentesque habitant morbi tristique senectus et netus et malesuada fames ac turpis egestas. Vestibulum a lacus vestibulum, placerat orci sit amet, fermentum ex. Donec id bibendum tortor. Nulla mollis a metus tincidunt lobortis. Donec facilisis orci eget ligula aliquet, non accumsan tellus mollis. Curabitur eu nibh sodales, fermentum orci vitae, iaculis purus. Pellentesque dapibus velit libero, pharetra bibendum nulla luctus quis. Pellentesque ut placerat sem.</text:p>
      <text:p text:style-name="P3"/>
      <text:p text:style-name="P3">Donec lectus tortor, consequat vitae risus in, vulputate luctus elit. In ullamcorper vitae lacus quis ornare. Suspendisse non nunc quis nibh commodo placerat nec ac ligula. Sed pulvinar, dui id vestibulum venenatis, orci mi convallis lacus, a consectetur nibh nisi at turpis. Donec convallis velit a urna pretium vulputate. Cras elementum mauris tincidunt luctus fringilla. Maecenas dictum viverra eros non dictum. Etiam eu erat ac purus blandit porta a non nibh. Aenean euismod interdum erat. Mauris et ligula odio. In at orci pharetra, convallis dui id, vehicula purus. Aliquam eros massa, efficitur eget metus vel, rutrum lobortis diam.</text:p>
      <text:p text:style-name="P3"/>
      <text:p text:style-name="P3">Phasellus luctus congue odio, non eleifend tortor lacinia non. Integer id vulputate felis. Nunc augue libero, commodo ac ultricies at, egestas sit amet purus. Quisque vitae urna in mauris hendrerit tempus ut in diam. Ut dolor velit, imperdiet nec nisi in, mattis fringilla felis. In hac habitasse platea dictumst. Vestibulum arcu eros, cursus vitae libero quis, bibendum euismod augue. Suspendisse rhoncus vel turpis varius aliquam.</text:p>
      <text:p text:style-name="P3"/>
      <text:p text:style-name="P3">Vivamus enim quam, facilisis eget elementum ac, pretium nec dui. Nam pretium mi vitae metus euismod, ut lobortis elit dignissim. Nam hendrerit, purus ac lacinia interdum, tellus libero ultrices nunc, vitae convallis metus felis vel est. Nullam auctor nisi a sem iaculis posuere. Nullam lorem <text:soft-page-break/>lacus, porttitor non ipsum a, sodales interdum felis. Pellentesque sit amet nulla tempus, mattis nisi ut, volutpat purus. Donec quis erat id nisl fermentum sagittis ac sit amet ligula. Mauris eget ex eget odio varius tristique.</text:p>
      <text:p text:style-name="P3"/>
      <text:p text:style-name="P3">Maecenas at est eu lacus tempor finibus ut vitae metus. Phasellus convallis erat et condimentum tincidunt. Vestibulum maximus pretium ultrices. Maecenas rutrum at tellus accumsan auctor. Quisque et mi eget nunc iaculis pellentesque. Quisque vel leo tortor. Mauris congue enim in fermentum finibus. Aliquam nec venenatis nulla, quis aliquet felis. Etiam sodales arcu ac eros faucibus, quis molestie orci finibus. Nullam dapibus eros ipsum, in maximus sem dapibus eu. Quisque turpis eros, sodales vel eleifend sed, hendrerit vitae lorem.</text:p>
      <text:p text:style-name="P3"/>
      <text:p text:style-name="P3">Donec mattis magna a risus gravida, a cursus sapien convallis. Aenean maximus orci elit, eget consequat ex lobortis sit amet. Quisque accumsan orci quis ligula ultrices dapibus. Curabitur laoreet enim eget condimentum viverra. Aenean auctor eget magna non ultricies. Praesent quis justo at nisi rhoncus vestibulum. Donec tellus erat, pharetra nec mauris vitae, dapibus accumsan nulla. Suspendisse at scelerisque dolor, vel scelerisque elit. Vestibulum sagittis, risus id scelerisque sagittis, lacus dolor dignissim erat, ut feugiat elit mauris vitae justo. Donec dictum sem a mauris aliquet, ultrices rutrum enim tincidunt. Nullam interdum tellus quis leo semper, non posuere diam facilisis. Phasellus semper sit amet massa eget suscipit. Maecenas nec ex et magna tincidunt mattis eget vel dolor. Vestibulum turpis erat, vehicula at magna ac, elementum dictum turpis. Vestibulum in malesuada sem.</text:p>
      <text:p text:style-name="P3"/>
      <text:p text:style-name="P3">Proin egestas dolor et libero finibus iaculis. In eu risus ante. Pellentesque habitant morbi tristique senectus et netus et malesuada fames ac turpis egestas. In consectetur eros nisi, et sagittis leo imperdiet et. Integer commodo metus eu ex porta, at faucibus velit placerat. Proin non orci sapien. Duis bibendum tortor eget sodales varius. Phasellus gravida neque sed ipsum placerat, ac malesuada tellus commodo. In euismod nibh ac nunc ultricies pretium. Vivamus eu tincidunt enim.</text:p>
      <text:p text:style-name="P3"/>
      <text:p text:style-name="P3">Phasellus purus libero, efficitur eget elit eu, blandit posuere mauris. Aenean felis neque, scelerisque sit amet eros ut, convallis venenatis nisl. Vestibulum semper libero nec nisi consequat, ut consequat lacus tincidunt. Nam tristique tempus lacus. Suspendisse sagittis nibh facilisis, laoreet urna sit amet, cursus ipsum. Curabitur in libero vulputate, rutrum turpis sed, congue augue. Curabitur a pulvinar est.</text:p>
      <text:p text:style-name="P3"/>
      <text:p text:style-name="P3">Lorem ipsum dolor sit amet, consectetur adipiscing elit. Morbi in pharetra lacus, sit amet iaculis sem. Duis consequat ex at lorem hendrerit, eget luctus lorem molestie. Sed libero elit, vehicula id blandit interdum, semper sed mi. Aliquam suscipit tristique purus, ut dapibus ex posuere sed. Maecenas suscipit fermentum tellus vel venenatis. Nullam sem nisl, sagittis vel tincidunt placerat, convallis nec dolor. Suspendisse eget sapien vitae nisl lobortis volutpat. Morbi quis eros quis quam tincidunt interdum. Quisque pellentesque, justo fringilla hendrerit sagittis, libero dui ornare lacus, et semper quam nunc non nunc. Aenean pharetra tempor sem, a pharetra risus. Proin ex ipsum, venenatis pulvinar faucibus a, laoreet non ipsum. Donec non augue a arcu fermentum tempor ut vel ipsum. Integer in tortor ut nulla iaculis finibus. Vestibulum ac euismod enim, et consectetur nibh.</text:p>
      <text:p text:style-name="P3"/>
      <text:p text:style-name="P3">Morbi pulvinar nibh vel nisl molestie, in convallis augue volutpat. Maecenas at ornare libero. Vestibulum suscipit elit lacus, sit amet consectetur risus sagittis sit amet. Quisque sit amet felis id neque sagittis condimentum id eu sapien. Mauris id posuere nibh. Duis eget nisl vel nisi pulvinar tempus lacinia nec nunc. Nulla viverra leo vel urna lacinia, vitae ultricies augue fringilla.</text:p>
      <text:p text:style-name="P3"/>
      <text:p text:style-name="P3">Donec malesuada gravida nulla ac pellentesque. Quisque mattis consequat porttitor. Donec nec libero sit amet nibh placerat ultrices. Cras bibendum metus nec augue dignissim vulputate. Nunc nec ante lacus. Ut ullamcorper urna ante, et ultricies lacus maximus eu. Sed sodales sapien nunc, a <text:soft-page-break/>tincidunt risus interdum ac. Fusce vulputate tincidunt nibh, a tristique nibh dignissim a. Quisque pharetra odio massa. Mauris posuere nulla sit amet ligula molestie tempor. Nam nec molestie risus. In mauris urna, iaculis vitae tellus non, tempor dapibus augue. Sed at lobortis quam. Proin ac placerat tortor. Nullam orci lacus, posuere finibus maximus eu, fermentum sed sem.</text:p>
      <text:p text:style-name="P3"/>
      <text:p text:style-name="P3">Donec convallis metus nec risus blandit elementum sed nec nisl. Curabitur vehicula pretium mauris vitae rutrum. Etiam lacinia accumsan lacus, quis aliquam enim cursus quis. Nunc semper elit vel dapibus efficitur. Aenean in consectetur dolor, eget finibus augue. Praesent et odio urna. Aenean maximus est non nulla mollis facilisis. Maecenas suscipit a dui in venenatis. Praesent convallis nec ante ut rutrum. Nunc eget risus id dolor malesuada porta. Nunc ac massa lectus. Aenean tempor orci felis, at placerat purus pretium eu. In at nulla et sapien fringilla luctus. Proin sit amet odio in ante consectetur luctus vel vitae enim. Proin elit quam, fringilla nec dui ac, laoreet dictum augue. Morbi pellentesque semper libero, non viverra nulla pellentesque a.</text:p>
      <text:p text:style-name="P3"/>
      <text:p text:style-name="P3">Nunc maximus diam et porttitor convallis. Nulla varius dapibus leo, vel viverra magna pretium a. Pellentesque habitant morbi tristique senectus et netus et malesuada fames ac turpis egestas. Vivamus varius tempus ante, et volutpat orci facilisis a. Curabitur vel aliquet leo. Fusce vel massa dictum, fringilla dui nec, tempor turpis. Curabitur hendrerit urna in arcu tincidunt, eget aliquam magna lobortis. Donec dolor lacus, aliquet non tellus sed, hendrerit convallis ipsum. Donec finibus ipsum id mauris hendrerit, ut volutpat tortor elementum. Etiam consequat vel libero in commodo. Duis sagittis quam at feugiat pulvinar. Nullam consectetur, sem ac auctor euismod, ipsum dui iaculis lorem, a laoreet erat orci et tortor. Suspendisse quis magna tincidunt, pulvinar purus a, consectetur mauris. Mauris malesuada, ex at tempus accumsan, sapien nulla lacinia leo, at ullamcorper eros eros interdum mauris. Duis quis aliquet nulla, at tincidunt nulla. Etiam nec massa sollicitudin, laoreet lacus in, commodo felis.</text:p>
      <text:p text:style-name="P3"/>
      <text:p text:style-name="P3">Fusce placerat neque et nibh elementum volutpat. Fusce tincidunt libero at efficitur ultricies. Pellentesque malesuada, eros vel fermentum pharetra, mi sapien luctus augue, at volutpat nulla nisl et erat. Etiam varius justo nec augue posuere, non egestas sem molestie. Cras aliquam neque augue, vel sagittis arcu venenatis sit amet. Nunc vulputate, nulla ut ultrices bibendum, velit dolor aliquet odio, congue pulvinar risus purus vel massa. Phasellus tristique, velit ut feugiat laoreet, nisl metus sodales tortor, eu interdum leo mi in enim. Aenean iaculis massa nulla. Phasellus a lorem ultrices, pretium leo sed, bibendum diam. Morbi arcu velit, ultricies quis nulla ac, malesuada ultrices justo. Integer ultrices tincidunt enim, in consequat quam faucibus sed. Nunc in egestas ipsum. Maecenas auctor libero ac venenatis pulvinar.</text:p>
      <text:p text:style-name="P3"/>
      <text:p text:style-name="P3">Duis vulputate maximus erat vitae ullamcorper. Integer viverra massa vitae felis euismod sagittis. Nulla quis lacinia magna. Mauris sagittis nisi ac justo varius varius non et ex. Nullam nisi velit, dapibus eget enim sit amet, tincidunt volutpat nunc. Duis congue at leo viverra finibus. Nam pretium mi at dui porttitor, a tempus sapien vestibulum. Cras auctor augue vitae nisi suscipit, in iaculis tellus hendrerit. Lorem ipsum dolor sit amet, consectetur adipiscing elit.</text:p>
      <text:p text:style-name="P3"/>
      <text:p text:style-name="P3">Maecenas lorem leo, auctor sit amet dictum ut, mattis sit amet velit. Phasellus non dui metus. Nunc libero eros, egestas ut consectetur sit amet, euismod vitae urna. Nullam non enim tincidunt, vehicula arcu a, rutrum mauris. Quisque placerat consequat quam quis semper. Aenean eu efficitur turpis. Sed in lectus ullamcorper, facilisis enim ut, volutpat quam. Vivamus vel mollis nunc, eu dictum ex. Nulla ultricies libero velit, at convallis lectus cursus id. Nam aliquet vulputate ante, id tempus arcu eleifend eu. Fusce imperdiet nisl id ex sagittis tristique.</text:p>
      <text:p text:style-name="P3"/>
      <text:p text:style-name="P3">Curabitur elit lorem, blandit sit amet risus eu, ultricies mollis felis. Pellentesque id blandit tellus. Sed non volutpat ligula. Ut efficitur finibus odio a mollis. Maecenas maximus, nunc at finibus ornare, orci justo efficitur quam, sed finibus mauris diam ac ante. Proin imperdiet tincidunt <text:soft-page-break/>vehicula. Mauris aliquam sapien eu nibh rhoncus, at pretium ex dapibus. Nulla pharetra eget risus sit amet blandit. Aliquam erat volutpat. Morbi efficitur, nisl at hendrerit placerat, urna est bibendum turpis, et vestibulum leo enim a quam. Fusce semper ante in tristique condimentum. Vivamus dolor tortor, lacinia eu urna nec, porta dictum metus. Sed at lectus scelerisque, elementum lectus eu, faucibus mauris. Aenean tempus sed velit nec ultrices.</text:p>
      <text:p text:style-name="P3"/>
      <text:p text:style-name="P3">Donec eget porttitor mauris, ultrices dictum lacus. Suspendisse in ligula quis nunc pretium feugiat et sit amet leo. Duis pretium, enim id euismod accumsan, ante leo rhoncus sapien, quis tempus lorem velit a lectus. Mauris non urna et orci bibendum viverra. Integer dui enim, aliquet ac sollicitudin in, vehicula at ligula. Curabitur quis tempus magna. Duis ipsum dui, aliquam accumsan eleifend et, ornare at eros. Nam metus tortor, maximus non arcu non, tempor sodales leo. Ut rutrum risus venenatis tincidunt semper. Phasellus fermentum, odio ac ultrices mollis, felis quam suscipit mauris, sit amet mattis urna nibh eget ipsum. Lorem ipsum dolor sit amet, consectetur adipiscing elit. Praesent aliquam urna in vehicula posuere. Class aptent taciti sociosqu ad litora torquent per conubia nostra, per inceptos himenaeos. Etiam eget nulla est. Mauris nec tincidunt quam. Pellentesque aliquet lobortis varius.</text:p>
      <text:p text:style-name="P3"/>
      <text:p text:style-name="P3">Curabitur auctor ante ac tellus laoreet porta. Donec fringilla faucibus risus ut sollicitudin. Suspendisse hendrerit risus eget purus auctor rhoncus. Pellentesque habitant morbi tristique senectus et netus et malesuada fames ac turpis egestas. Nam mollis dapibus tristique. Donec lorem tortor, eleifend et efficitur suscipit, fringilla ut justo. Vestibulum semper arcu sed gravida porta. Maecenas at ligula a justo efficitur bibendum. Proin gravida arcu justo, eu molestie justo ultrices a. Curabitur et porttitor nisi, aliquam imperdiet purus.</text:p>
      <text:p text:style-name="P3"/>
      <text:p text:style-name="P3">Mauris leo libero, imperdiet at arcu sit amet, efficitur euismod eros. Vestibulum ex nisl, posuere accumsan nisi eu, rhoncus congue urna. Proin et ullamcorper orci. Pellentesque molestie lobortis aliquam. Curabitur eget consectetur massa. Morbi eros tellus, condimentum eget rhoncus ut, scelerisque ac tellus. Praesent vel risus felis. Nullam luctus diam in ligula vehicula, non sodales quam mollis. Pellentesque quam mi, interdum ac suscipit ac, venenatis eget nunc. Duis commodo urna non tempus mattis. Ut et urna et urna mollis elementum vel vel augue. Nulla nec fermentum sem. Etiam tempor vestibulum egestas. Nunc elementum tortor velit, eu euismod odio rutrum sit amet. Curabitur fringilla pretium lectus, nec egestas lectus ultrices sodales. Nam feugiat faucibus mauris mollis hendrerit.</text:p>
      <text:p text:style-name="P3"/>
      <text:p text:style-name="P3">Morbi lacinia hendrerit dictum. Nulla cursus est sit amet turpis maximus, quis tincidunt tellus blandit. Nunc sit amet metus eget eros pharetra fringilla. Nulla sollicitudin scelerisque posuere. Phasellus eu mattis elit. Etiam porttitor dictum nibh eget porttitor. Praesent in commodo dolor. Etiam facilisis eu justo sed dignissim. Lorem ipsum dolor sit amet, consectetur adipiscing elit. Sed sed diam pulvinar, scelerisque justo ac, egestas felis. Maecenas dolor augue, congue at ultricies vel, lobortis et odio.</text:p>
      <text:p text:style-name="P3"/>
      <text:p text:style-name="P3">Ut arcu erat, pretium et leo et, maximus sodales mauris. Aenean tincidunt auctor iaculis. Mauris semper nisl eu justo volutpat, vitae ornare nisl imperdiet. In viverra hendrerit euismod. Etiam eu massa nec felis accumsan gravida. Aenean sagittis justo ac tincidunt porta. Integer imperdiet ipsum at sem vestibulum, quis elementum orci pellentesque. Sed quis ullamcorper mauris. Suspendisse id dictum nibh, at hendrerit ligula. Fusce turpis magna, iaculis sed odio sit amet, accumsan efficitur felis.</text:p>
      <text:p text:style-name="P3"/>
      <text:p text:style-name="P3">Maecenas at ex et quam pretium placerat. Quisque rhoncus purus eget purus finibus blandit. Donec dapibus condimentum felis ut bibendum. Ut consequat dignissim turpis, ut blandit nulla semper at. Maecenas commodo egestas tempus. Pellentesque lobortis ex tortor, eget gravida nisl commodo id. Nam blandit egestas turpis eu accumsan. Aenean pharetra vitae sapien ultricies scelerisque. Sed eget <text:soft-page-break/>pellentesque nibh. Sed ac ornare mauris. Donec pharetra lectus eget suscipit laoreet. Duis auctor maximus mollis. Nam a tincidunt erat. Etiam non accumsan tellus. Aenean eu nunc consequat, semper nunc eu, efficitur felis. Morbi sapien massa, egestas eget ex vel, hendrerit tristique mi.</text:p>
      <text:p text:style-name="P3"/>
      <text:p text:style-name="P3">Integer lacinia, augue a lobortis sodales, enim leo mollis ante, eu imperdiet eros ligula at ipsum. Nullam sed mauris ligula. Sed hendrerit dictum nibh, ut egestas arcu bibendum et. Maecenas neque lorem, euismod nec felis sit amet, lacinia lacinia tellus. Nullam sit amet urna ligula. In hac habitasse platea dictumst. Vivamus vel felis sapien. Proin euismod massa dolor, a hendrerit magna condimentum quis. Aliquam quis urna ut lacus fermentum sollicitudin nec ac risus. Quisque pretium pulvinar quam. Aenean vestibulum sapien orci, non laoreet nulla ultricies eget. Suspendisse eu quam non sapien ultrices rutrum pellentesque quis nisi. Nullam commodo nisi non purus posuere, non malesuada erat tincidunt. In mollis dolor nec ipsum bibendum efficitur. Ut auctor magna id sapien tempus tincidunt.</text:p>
      <text:p text:style-name="P3"/>
      <text:p text:style-name="P3">Suspendisse in ex eget eros bibendum varius. Suspendisse sit amet magna tempor, gravida purus quis, consequat felis. Nullam nec condimentum nisl. Quisque interdum faucibus tellus, eget mollis sapien fermentum ac. Fusce a lectus blandit, sagittis urna eu, sagittis justo. Sed hendrerit, lectus et gravida faucibus, massa odio suscipit erat, sed accumsan lectus dolor non lectus. Curabitur dignissim enim sed ipsum consequat, id posuere ante tempus.</text:p>
      <text:p text:style-name="P3"/>
      <text:p text:style-name="P3">Aenean nec massa urna. Sed semper, massa non accumsan dignissim, massa sem iaculis sem, finibus gravida lacus tortor at elit. Nam egestas porta nunc pharetra pharetra. Curabitur enim diam, efficitur eget porta eu, sodales vel nisl. Nam pellentesque neque ut risus ullamcorper fringilla. Duis ac lacus eu est egestas varius in ut libero. Morbi in enim at risus interdum sollicitudin. Praesent volutpat mi a magna interdum varius. Phasellus mauris quam, sodales sit amet luctus ac, fringilla faucibus erat. Nunc aliquam libero et orci vestibulum, sed faucibus felis dignissim.</text:p>
      <text:p text:style-name="P3"/>
      <text:p text:style-name="P3">Vestibulum accumsan est egestas sem bibendum, id convallis lectus molestie. Sed pellentesque libero neque, elementum mattis diam sodales ac. In rutrum condimentum congue. Integer aliquam consectetur volutpat. Vivamus auctor ex euismod leo pretium euismod et ac turpis. Praesent porta arcu odio, convallis malesuada purus maximus ut. Vestibulum feugiat ultrices ligula, sed scelerisque quam hendrerit ut. Sed id quam suscipit orci sagittis ullamcorper. Donec vitae ante euismod, interdum sapien sed, ornare tellus. Nam lacus lectus, iaculis ut lectus sit amet, suscipit volutpat enim. Nullam lacinia dolor a tortor dapibus varius non sed arcu. Sed vel justo scelerisque, pellentesque est vel, faucibus libero. Nam sodales est id arcu volutpat, a pulvinar diam malesuada. In a varius erat. Proin consectetur sapien justo, eu condimentum massa pellentesque at.</text:p>
      <text:p text:style-name="P3"/>
      <text:p text:style-name="P3">Cras semper odio eget dictum tincidunt. Suspendisse at sapien laoreet, aliquam nunc pellentesque, semper urna. In quis aliquam orci. Vivamus tincidunt libero libero, vel blandit ligula feugiat in. Proin bibendum nulla sit amet pulvinar vulputate. Praesent id erat urna. In hac habitasse platea dictumst. Aenean ut mollis dui, nec hendrerit dui. Morbi sed lobortis sem. Donec rutrum accumsan diam. Cras nulla odio, cursus non nisi posuere, sagittis elementum arcu. Quisque in congue massa, vitae tincidunt arcu.</text:p>
      <text:p text:style-name="P3"/>
      <text:p text:style-name="P3">Donec eu orci dapibus, scelerisque mauris sed, semper eros. Donec facilisis nisi ut nulla porta, et dictum turpis auctor. In sed felis sit amet orci consectetur lobortis eget a lacus. Aenean purus mi, tristique eu varius in, bibendum faucibus quam. Praesent porta commodo ipsum, non condimentum arcu cursus sit amet. Morbi in dolor libero. Sed sit amet sem venenatis, malesuada nulla a, consequat ex. Pellentesque a lorem quam. Nam dictum erat sed diam pharetra, ut imperdiet lorem luctus. Mauris fringilla aliquam augue. Quisque hendrerit dui dignissim, semper velit auctor, imperdiet tortor. Suspendisse dui massa, faucibus ac nisi mattis, commodo posuere odio.</text:p>
      <text:p text:style-name="P3"/>
      <text:p text:style-name="P3"><text:soft-page-break/>Cras facilisis, ipsum non ornare facilisis, diam nunc auctor dui, vitae congue urna purus a lacus. Phasellus placerat consequat enim, ac aliquam ante gravida in. Suspendisse ullamcorper leo arcu, venenatis bibendum ex posuere a. Vestibulum viverra, urna non pharetra consequat, elit ipsum ullamcorper nunc, at viverra odio eros at est. Aenean et justo tempor, pretium eros at, posuere nunc. Suspendisse lacus velit, pellentesque ac sem in, rhoncus ullamcorper nulla. Proin vel tincidunt diam. Sed a libero pellentesque mi maximus porta ac sit amet sapien.</text:p>
      <text:p text:style-name="P3"/>
      <text:p text:style-name="P3">Praesent et nisl sit amet diam sollicitudin auctor ac ac neque. Sed semper leo vitae sapien semper, in posuere felis fringilla. Morbi nec lectus ante. Cras nec egestas est, id suscipit sem. Aenean vestibulum sapien sit amet dui sodales, ultrices consequat dui aliquam. Donec mi eros, dapibus at turpis vel, facilisis ultricies neque. Etiam fringilla elementum venenatis. Quisque egestas in lectus a venenatis.</text:p>
      <text:p text:style-name="P3"/>
      <text:p text:style-name="P3">Morbi pharetra dignissim ex, at varius leo vulputate et. Pellentesque a velit at augue aliquam euismod. Curabitur elementum orci vel blandit commodo. Nam nisl sem, malesuada eget tempor at, tincidunt sit amet magna. Ut augue erat, cursus aliquet nulla non, posuere mattis ex. Quisque condimentum posuere velit ac efficitur. Fusce porta ipsum risus, sed dignissim odio convallis et. Pellentesque nunc elit, dignissim sit amet cursus at, pretium a lectus. Cras ut tellus volutpat, auctor orci sed, hendrerit diam. Fusce venenatis odio sed tellus pulvinar, quis mollis odio tincidunt. Sed sit amet consequat dui. Vivamus eu arcu ex. Aenean nec ultricies lectus.</text:p>
      <text:p text:style-name="P3"/>
      <text:p text:style-name="P3">Aliquam sem tortor, varius ut purus tempus, pellentesque consequat nulla. Nam nec est at tortor laoreet tempor nec sit amet ex. Nullam condimentum eros lorem, vel iaculis nulla elementum eget. Vestibulum id odio elementum, molestie risus sed, egestas libero. Interdum et malesuada fames ac ante ipsum primis in faucibus. Vivamus lacinia vel ante non efficitur. Etiam nec pharetra arcu. Donec consectetur dapibus lectus, eu varius lacus consectetur nec. Etiam luctus, lacus non varius elementum, neque justo auctor metus, non sagittis quam lacus et neque. Mauris commodo magna vitae est fringilla viverra. Morbi ullamcorper sit amet mauris a hendrerit. Cras tempus eros sit amet fermentum tempor. Duis pharetra, lacus scelerisque volutpat pharetra, dolor justo tincidunt felis, id aliquam eros urna a nisl. Curabitur vel nisl ac diam mollis porta. Ut interdum, risus a gravida sodales, est est egestas augue, ut finibus lectus lorem at ante. Sed nec porttitor dui.</text:p>
      <text:p text:style-name="P3"/>
      <text:p text:style-name="P3">Sed neque sem, molestie sit amet nisl at, laoreet dapibus est. Cras laoreet malesuada elementum. Vestibulum vel ex eget neque posuere dictum. In risus tellus, sodales at tincidunt sit amet, egestas at diam. Proin tellus massa, aliquam ut lorem ut, pretium ullamcorper purus. Vestibulum ligula massa, convallis vel suscipit ac, ultrices ut nulla. Nam feugiat pulvinar arcu, non lobortis dolor pretium ac. Phasellus eget eleifend enim. Vestibulum lobortis mi vel massa mattis, ac semper est auctor. In hac habitasse platea dictumst. Sed fermentum hendrerit massa sed efficitur. Nam eu sem est. Cras et nisl ac ipsum consequat viverra. Mauris egestas libero nibh, eu imperdiet lacus sagittis nec. Suspendisse non ipsum quis libero tincidunt volutpat.</text:p>
      <text:p text:style-name="P3"/>
      <text:p text:style-name="P3">Suspendisse luctus, nisi et dapibus tempus, massa mauris egestas purus, sit amet sodales turpis libero a eros. Donec auctor odio id lacus mattis, venenatis tempus nisl malesuada. Aenean placerat leo odio, eu pellentesque ante tincidunt quis. Curabitur sed porta lectus, nec commodo massa. Nullam suscipit, risus at cursus mollis, odio turpis ultricies ex, vitae fermentum turpis elit non dui. Curabitur viverra augue non sem auctor egestas. Suspendisse potenti. Ut vitae sapien ultricies, sollicitudin odio nec, imperdiet erat. Vestibulum ante ipsum primis in faucibus orci luctus et ultrices posuere cubilia curae; Ut a est urna. Donec sed aliquam magna, ut lacinia nisl. Curabitur non nisi in ipsum sagittis porttitor et a arcu. Quisque libero nunc, tempor ac risus vitae, dictum pharetra urna. Pellentesque a lacus quis urna maximus porttitor sed quis neque.</text:p>
      <text:p text:style-name="P3"/>
      <text:p text:style-name="P3"><text:soft-page-break/>Duis luctus lorem lacus, et gravida diam blandit a. Pellentesque a nibh a tortor sodales posuere. Fusce non convallis tellus, id commodo lectus. Duis ac bibendum velit. Nunc id felis nisi. Morbi non sem nec dui dapibus vehicula in eu dolor. Quisque felis augue, porta at urna at, tristique scelerisque libero. Nunc ornare quam dignissim est tempus aliquam. Mauris commodo ipsum a lectus commodo tincidunt. Sed posuere orci sed nibh finibus, nec pellentesque nulla posuere.</text:p>
      <text:p text:style-name="P3"/>
      <text:p text:style-name="P3">Donec lobortis scelerisque libero quis ornare. Morbi tincidunt pharetra odio ut dapibus. Fusce luctus, nisi at convallis laoreet, libero eros aliquam neque, at mollis velit sapien sit amet risus. Nullam eget euismod justo. Sed ac purus nunc. Maecenas a risus ut metus rutrum porttitor eget quis nisi. Duis venenatis rhoncus tellus quis fermentum. Nulla facilisi. Duis gravida nisl in imperdiet porttitor. Praesent velit sapien, semper vel pretium vitae, facilisis sodales elit. Aliquam erat volutpat. Class aptent taciti sociosqu ad litora torquent per conubia nostra, per inceptos himenaeos. Phasellus porta porta lorem eu fringilla. Nulla rutrum gravida porttitor.</text:p>
      <text:p text:style-name="P3"/>
      <text:p text:style-name="P3">Vestibulum bibendum ipsum lorem, facilisis dignissim justo commodo ac. Sed nisl odio, porttitor et venenatis vitae, scelerisque nec augue. Pellentesque varius, tortor in viverra blandit, eros ex hendrerit velit, sit amet facilisis justo erat eget sapien. Fusce eu dictum erat. Sed sit amet sem augue. Aenean turpis libero, tristique a pellentesque a, commodo vitae sem. Sed interdum lorem quis augue vulputate, at blandit odio rutrum. Fusce malesuada eleifend enim et convallis. Phasellus ac velit eget tortor convallis placerat. Pellentesque habitant morbi tristique senectus et netus et malesuada fames ac turpis egestas. Curabitur consequat, leo id pretium tincidunt, magna ligula ultrices dolor, non lacinia ante ex ac sapien.</text:p>
      <text:p text:style-name="P3"/>
      <text:p text:style-name="P3">Proin ornare luctus arcu eu egestas. Praesent vulputate, odio eu bibendum auctor, erat odio hendrerit neque, et aliquam risus diam sed nisl. Mauris eu nisi ultrices, euismod tortor vitae, pulvinar sem. Nulla varius imperdiet ligula ac mattis. Aliquam laoreet velit sapien, non consectetur tellus interdum sed. Nullam sit amet turpis maximus, mollis nunc ut, ullamcorper tortor. Integer bibendum vel risus nec lobortis. In elementum orci nec mi hendrerit ornare. Fusce eleifend sagittis rutrum. Etiam vitae lobortis eros. Quisque a velit molestie, suscipit velit ac, volutpat sapien. Morbi blandit quam eu diam commodo, facilisis porttitor diam porta. Ut pulvinar varius odio suscipit fringilla. Vivamus id pulvinar magna, quis placerat lectus. Aenean velit sem, pretium vitae mattis at, feugiat id est. Phasellus in magna eget nulla scelerisque vulputate non eget mauris.</text:p>
      <text:p text:style-name="P3"/>
      <text:p text:style-name="P3">Maecenas id malesuada nunc. Proin sodales, nunc non ultrices molestie, risus turpis ultrices dolor, mattis faucibus erat eros non justo. Suspendisse nec nisl vitae purus maximus commodo. Phasellus auctor vel diam vel dictum. Cras tincidunt, libero quis commodo pretium, metus nunc sodales felis, et aliquet turpis massa in dolor. Etiam non elit nisi. Morbi lectus magna, tincidunt sed nisl sit amet, consequat mollis enim. Nullam bibendum libero mattis aliquam consectetur. Nam malesuada velit sapien, sed ullamcorper felis gravida a. Vestibulum aliquam convallis sem vel posuere. Integer vulputate tellus vel nulla efficitur facilisis.</text:p>
      <text:p text:style-name="P3"/>
      <text:p text:style-name="P3">Ut tellus mi, malesuada vulputate auctor in, pulvinar nec sapien. Nunc hendrerit luctus interdum. Pellentesque egestas in ex sit amet imperdiet. Morbi iaculis, magna et eleifend efficitur, augue nunc tincidunt lacus, sit amet tincidunt ipsum quam eget mauris. Aliquam bibendum commodo felis quis fermentum. Cras nec dictum tortor. Sed pharetra ex dolor, ut malesuada nisi congue a. Pellentesque arcu ante, sagittis at faucibus in, pretium vel nibh. Sed ultricies tellus vitae augue volutpat, nec accumsan purus congue.</text:p>
      <text:p text:style-name="P3"/>
      <text:p text:style-name="P3">Nulla mattis id quam id ornare. Duis vel auctor tortor. Morbi maximus, erat pharetra eleifend viverra, dui nunc imperdiet nunc, ac tristique ex nibh at libero. Etiam elementum nisi id risus tempor, ac laoreet lectus eleifend. Maecenas vel velit at libero auctor molestie in eget ante. Proin ac metus et odio tincidunt gravida ac scelerisque dui. Nam venenatis aliquam augue, eu luctus justo. <text:soft-page-break/>Nulla tincidunt turpis eget nisi vehicula commodo. Sed feugiat vehicula sem, et mattis turpis elementum vitae. Sed imperdiet quam ut tortor luctus laoreet.</text:p>
      <text:p text:style-name="P3"/>
      <text:p text:style-name="P3">Nam et magna nec ante luctus ullamcorper. Mauris commodo est nec venenatis mattis. Integer nec mauris vehicula, consequat elit ac, semper quam. Vestibulum non nisl et enim lobortis maximus. Phasellus condimentum feugiat erat, quis molestie nibh. Nam a mi quis augue euismod vestibulum vel sit amet nisl. Maecenas a suscipit eros. Aliquam eu risus pretium, imperdiet lacus at, suscipit odio. Aenean id mi condimentum, congue mi sed, tincidunt erat. Donec porttitor ipsum eu ante fringilla fermentum. Etiam accumsan dui augue, facilisis volutpat massa imperdiet non. Donec rhoncus dignissim risus, et lobortis dui malesuada ac. Pellentesque habitant morbi tristique senectus et netus et malesuada fames ac turpis egestas. Praesent ultricies, diam in vehicula tincidunt, magna felis gravida nulla, non eleifend enim leo et neque. Nulla dignissim quis metus ut condimentum. Donec fermentum metus ut neque pretium, vitae aliquet ex facilisis.</text:p>
      <text:p text:style-name="P3"/>
      <text:p text:style-name="P3">Donec viverra cursus mauris, vel gravida ante auctor non. Pellentesque sit amet sodales magna. Etiam vitae ipsum vel nulla suscipit faucibus et eu magna. Suspendisse elementum turpis scelerisque odio tincidunt ullamcorper. Integer elementum sapien non leo pretium, vitae pharetra erat fringilla. Etiam aliquam ligula in consequat suscipit. Vestibulum ut nisl lorem. Proin tempor, velit ut malesuada vestibulum, nunc ligula molestie est, sed vulputate turpis magna a magna.</text:p>
      <text:p text:style-name="P3"/>
      <text:p text:style-name="P3">Curabitur ac lectus velit. Nam rhoncus euismod volutpat. Nullam et dictum ante, at tincidunt mauris. Donec lorem ligula, semper vitae magna non, vehicula ultrices dui. Vestibulum mattis metus a orci iaculis efficitur. Pellentesque ultrices, orci at facilisis tincidunt, est lorem suscipit odio, vel mattis velit nulla nec risus. Proin vitae mauris et ante dignissim pulvinar at sed turpis. Pellentesque pellentesque porttitor ullamcorper. Ut sit amet ligula commodo, porttitor ipsum sed, cursus ipsum. Suspendisse pharetra augue quis urna lobortis, non pharetra tellus mollis. Sed hendrerit euismod velit, fringilla elementum lacus tempus a. Vivamus sapien ante, tincidunt at aliquet sit amet, vehicula eget turpis. Proin volutpat interdum orci sit amet pulvinar. Etiam commodo purus sit amet leo laoreet, bibendum vulputate turpis suscipit. Praesent volutpat sagittis mi. Donec in dignissim enim.</text:p>
      <text:p text:style-name="P3"/>
      <text:p text:style-name="P3">Quisque consequat elementum libero, at porta ex sollicitudin a. Sed nibh sapien, pharetra ut maximus sed, bibendum eget elit. Nam facilisis elit a viverra cursus. Aliquam bibendum diam nec tellus varius tristique. Quisque non bibendum mauris. Phasellus et egestas ligula, at pharetra nunc. Cras orci ligula, vulputate vel posuere fermentum, sodales sed nisi. Phasellus interdum viverra odio, vel dignissim lorem volutpat quis. Mauris lectus lacus, sagittis et mi a, condimentum pretium erat. Nullam pretium velit ut congue ornare. Phasellus vel malesuada augue. Mauris fringilla placerat placerat. Etiam sed faucibus erat. Morbi auctor nisl vel ipsum ullamcorper, et laoreet lorem bibendum. Etiam tincidunt tortor a massa mattis porta.</text:p>
      <text:p text:style-name="P3"/>
      <text:p text:style-name="P3">Integer justo elit, cursus eu odio id, laoreet elementum elit. Praesent vel justo et lacus sagittis porttitor non eget odio. Sed tristique fringilla quam sit amet pretium. Etiam sodales ultrices neque, a lobortis mauris placerat id. Donec ac dui nec velit facilisis viverra eget sed metus. In a tortor quis lectus tincidunt pharetra. Vestibulum a vulputate dolor, nec maximus neque. In tempus porta diam id sodales. Pellentesque vestibulum euismod ullamcorper. Orci varius natoque penatibus et magnis dis parturient montes, nascetur ridiculus mus. Pellentesque quis ornare mauris. Maecenas malesuada tellus nunc, tristique pellentesque est suscipit ac.</text:p>
      <text:p text:style-name="P3"/>
      <text:p text:style-name="P3">Fusce et feugiat magna. Pellentesque at magna consectetur, sagittis diam nec, ornare dui. Morbi convallis tincidunt felis sit amet sodales. Mauris eget massa facilisis, condimentum quam non, eleifend ligula. Donec a ligula consectetur, venenatis ante et, tempor erat. Donec ultrices quis purus sed condimentum. Phasellus magna ipsum, condimentum quis nibh ut, luctus consequat eros. <text:soft-page-break/>Vestibulum vitae justo ullamcorper, mollis quam non, efficitur justo. Integer ac risus eget quam gravida ultricies id et ante.</text:p>
      <text:p text:style-name="P3"/>
      <text:p text:style-name="P3">Nullam tortor enim, dapibus non cursus sodales, suscipit quis nulla. Praesent mattis ligula mauris, ornare efficitur libero molestie id. Sed pellentesque pulvinar est. Mauris tincidunt nunc mauris, at porttitor nulla vulputate at. Ut imperdiet dignissim molestie. Nulla facilisi. Nunc nec odio sollicitudin, rutrum sapien at, lobortis eros. Aliquam congue pellentesque elementum. Donec volutpat neque urna, in interdum justo aliquet id. Morbi pretium accumsan enim quis cursus. Curabitur vitae aliquet leo. Etiam mollis urna urna, eu iaculis orci facilisis sed.</text:p>
      <text:p text:style-name="P3"/>
      <text:p text:style-name="P3">Etiam sit amet turpis molestie, tincidunt sem mattis, facilisis elit. Donec quis nibh malesuada, ultricies orci a, aliquam nulla. Nunc a nisl ex. Suspendisse lacinia tincidunt luctus. Fusce consequat gravida nisi sed tincidunt. Nulla facilisi. In venenatis suscipit sem ut ultricies. Maecenas eget convallis nisi, sit amet ornare mauris. Maecenas commodo turpis sed dignissim fringilla. Nulla facilisi. Nullam iaculis bibendum purus, sit amet dignissim tellus tincidunt eget. Nam pharetra condimentum ligula, ut convallis lorem posuere sit amet. Quisque ullamcorper elit vel justo faucibus, non pretium dolor cursus. Etiam molestie, nisl congue porttitor mollis, libero tortor tempus lacus, in elementum sem metus ac justo. Sed convallis urna at eleifend fringilla. Duis vulputate scelerisque lectus in mollis.</text:p>
      <text:p text:style-name="P3"/>
      <text:p text:style-name="P3">Mauris ac libero non mi euismod auctor quis vitae libero. Class aptent taciti sociosqu ad litora torquent per conubia nostra, per inceptos himenaeos. Integer hendrerit libero eu ligula tristique, id faucibus quam imperdiet. In lacinia sed sem fermentum iaculis. Nulla nibh diam, convallis eget mauris quis, sodales faucibus ligula. Etiam vel odio vitae dolor tincidunt ornare sit amet ac tellus. Pellentesque hendrerit nisl mi, ut vestibulum quam posuere ut. Fusce tempor, mi a condimentum consectetur, quam dolor luctus ipsum, eu ornare augue nibh vitae eros. Curabitur varius laoreet malesuada.</text:p>
      <text:p text:style-name="P3"/>
      <text:p text:style-name="P3">Etiam metus risus, pharetra et ligula nec, elementum finibus nunc. Praesent dui nisl, condimentum et lacus eget, sollicitudin semper lorem. Pellentesque habitant morbi tristique senectus et netus et malesuada fames ac turpis egestas. Nam varius metus nec purus sodales rutrum a a massa. Nam eros neque, lacinia vitae tincidunt id, volutpat congue turpis. Phasellus quis finibus nisi, et porttitor tortor. Sed eu risus vitae lorem pulvinar suscipit.</text:p>
      <text:p text:style-name="P3"/>
      <text:p text:style-name="P3">Aenean eu elit porttitor, volutpat eros non, vestibulum tortor. Aliquam lacinia placerat magna id feugiat. Mauris sollicitudin vitae nulla vitae congue. Vestibulum tempus sapien tortor, ac pulvinar nibh dictum gravida. Etiam nec diam vel magna vulputate feugiat at ac dui. Pellentesque vitae mi rhoncus, cursus ipsum eu, placerat purus. Phasellus erat nunc, sollicitudin sit amet commodo nec, blandit at ante. Nulla facilisi. Morbi quis consectetur lorem. Sed vehicula blandit commodo. Phasellus tempus mauris in purus fermentum, sit amet pellentesque ligula vehicula. Pellentesque nisi augue, placerat ut tincidunt eu, sollicitudin nec elit.</text:p>
      <text:p text:style-name="P3"/>
      <text:p text:style-name="P3">Mauris pellentesque viverra sem, et malesuada risus lobortis quis. Vestibulum nec finibus felis. Fusce sit amet nulla eu elit commodo suscipit. Vivamus tincidunt, leo eget ultrices ullamcorper, diam risus egestas ligula, faucibus mattis ipsum ligula in metus. Duis id est aliquam, ullamcorper nisi in, iaculis tortor. Proin id pharetra mauris, quis sodales turpis. Ut scelerisque justo ac porta bibendum. Proin faucibus metus auctor dui varius, a fringilla lectus ultricies. In fermentum at est at tristique. In eget mauris non erat dapibus lacinia ut id ante. Etiam mollis suscipit lorem, in mollis nisl cursus a. Curabitur porttitor in mauris at interdum. Vestibulum tempus consectetur mauris, vel semper nibh. Nam vitae ornare lorem. Cras eu lacinia quam. Nullam quis risus pharetra, hendrerit tellus eget, venenatis mi.</text:p>
      <text:p text:style-name="P3"/>
      <text:p text:style-name="P3"><text:soft-page-break/>Suspendisse a quam in sem blandit pulvinar. Aliquam ut pellentesque neque. Phasellus posuere at diam quis sagittis. Aenean ac egestas enim. Sed fringilla sapien diam, vitae convallis eros ullamcorper eleifend. Vivamus sollicitudin in neque et rutrum. Maecenas nunc urna, dapibus eget lectus quis, vehicula egestas massa. Pellentesque eget ullamcorper velit. Nam pretium nibh id finibus rhoncus. Donec at pretium justo. In sollicitudin mauris nec luctus hendrerit.</text:p>
      <text:p text:style-name="P3"/>
      <text:p text:style-name="P3">In hac habitasse platea dictumst. Pellentesque pellentesque varius aliquam. In varius neque eget tempor volutpat. Cras suscipit, sapien ut maximus laoreet, odio diam accumsan turpis, in efficitur leo lacus in metus. Proin nulla magna, accumsan consequat cursus eget, rhoncus quis felis. Suspendisse hendrerit imperdiet diam. Mauris ac tincidunt dolor. Nunc aliquet aliquet mi, vitae faucibus tellus sagittis finibus.</text:p>
      <text:p text:style-name="P3"/>
      <text:p text:style-name="P3">Donec ac lorem sed erat bibendum volutpat. Ut orci erat, tempus ac hendrerit vitae, placerat sed nibh. Suspendisse imperdiet finibus urna, eget vehicula dui ullamcorper suscipit. Curabitur non dolor pulvinar ligula varius mattis. Nulla in tortor porttitor, sodales arcu non, auctor neque. Vivamus eu iaculis erat. Nunc hendrerit mauris erat, ullamcorper convallis massa finibus nec. Donec maximus risus ut dictum efficitur. Morbi blandit ligula non justo semper, tristique sagittis libero semper. Donec elementum sodales turpis. Suspendisse tristique consectetur neque, vulputate convallis neque bibendum at. Vivamus ultricies pulvinar mauris.</text:p>
      <text:p text:style-name="P3"/>
      <text:p text:style-name="P3">Nunc sed mollis augue. Duis hendrerit rhoncus ante, vulputate maximus neque fringilla id. Praesent rutrum lorem est, sit amet sodales ante mattis vitae. Praesent risus sem, tincidunt quis porta sed, lobortis sit amet tortor. Proin pellentesque lorem justo. Ut molestie enim eu orci sollicitudin, non pretium ligula facilisis. Curabitur condimentum, orci venenatis elementum egestas, neque ligula faucibus odio, vitae viverra lacus nisi sed erat. Aenean eget aliquam arcu. Nulla tempor ac turpis in imperdiet. Pellentesque molestie neque lectus, ut aliquet arcu dictum nec.</text:p>
      <text:p text:style-name="P3"/>
      <text:p text:style-name="P3">Proin commodo non dui a gravida. Sed vel mattis nulla, eu bibendum mi. Ut sed massa ut mi venenatis blandit. Sed leo odio, rutrum eu sapien nec, mattis dapibus ligula. Ut interdum quis lectus ut malesuada. Nam dictum bibendum lacus, id condimentum tortor accumsan vitae. Sed facilisis sollicitudin massa ut convallis. Mauris maximus neque eget arcu laoreet tincidunt quis in turpis. Duis vestibulum ante in ultrices laoreet. Etiam eleifend ante eget urna tristique tincidunt. Nullam sit amet massa nisi. Duis rhoncus velit metus, vel euismod leo auctor ut. Etiam congue fermentum elit et tincidunt. Aliquam et tellus egestas, pellentesque diam id, condimentum nunc.</text:p>
      <text:p text:style-name="P3"/>
      <text:p text:style-name="P3">Nulla ac dui erat. Pellentesque iaculis arcu eget elit vulputate, et congue orci tempor. Quisque vehicula, odio et auctor fringilla, nunc tortor consectetur leo, et semper leo tortor vitae magna. Integer fermentum, risus ut lacinia convallis, lacus diam ornare velit, vel imperdiet diam mi non augue. Duis efficitur ultrices lorem eget tincidunt. Vivamus suscipit aliquet elit non luctus. Sed facilisis pellentesque iaculis. Curabitur vestibulum ac mauris et posuere. Suspendisse hendrerit, turpis ac molestie aliquam, massa ante consequat felis, eget interdum dolor tellus vitae nisl. Suspendisse potenti. Suspendisse erat justo, pharetra vitae vulputate vitae, tristique sed nisi.</text:p>
      <text:p text:style-name="P3"/>
      <text:p text:style-name="P3">Aliquam nunc felis, venenatis scelerisque viverra vitae, convallis in lacus. Duis eu auctor velit, eget vestibulum urna. Nam est sem, dapibus vel finibus vel, fermentum et nibh. Quisque aliquet, magna non luctus porta, nunc nisl consectetur ante, vitae sagittis dui dui semper justo. Mauris ullamcorper, purus a accumsan aliquet, felis nisi luctus leo, in lobortis nulla ligula a orci. Fusce eu odio placerat, accumsan diam eget, luctus odio. Proin justo nulla, laoreet eget magna quis, dictum aliquam arcu. Mauris arcu tellus, malesuada id neque et, aliquam condimentum est. Morbi nulla neque, sodales sit amet posuere ut, iaculis id eros. Nunc consectetur lorem vel feugiat commodo. Duis sed felis sollicitudin, gravida urna eu, volutpat ante. Suspendisse sed malesuada nulla. Proin vel euismod diam, vel consequat orci. Fusce scelerisque malesuada pretium.</text:p>
      <text:p text:style-name="P3"><text:soft-page-break/></text:p>
      <text:p text:style-name="P3">Integer commodo luctus pellentesque. Curabitur dolor mauris, suscipit eu orci nec, laoreet tempor tellus. Mauris maximus odio tortor, efficitur efficitur metus pretium vitae. Nunc vitae elementum leo, non pharetra odio. Praesent posuere auctor nisl vitae rutrum. Suspendisse accumsan tellus arcu, a maximus libero lacinia sit amet. Donec ut nibh dui.</text:p>
      <text:p text:style-name="P3"/>
      <text:p text:style-name="P3">In scelerisque ultricies dui vel posuere. Aliquam felis magna, eleifend ac gravida sit amet, rhoncus sit amet leo. Cras tempor tempor elit eu lacinia. Morbi condimentum lacus at turpis eleifend, posuere scelerisque tellus elementum. Integer id neque cursus, tempus dolor sed, lacinia libero. Quisque ipsum velit, ornare sed ex nec, euismod imperdiet odio. Vivamus vel magna egestas, eleifend justo in, maximus purus. Suspendisse bibendum in lacus in suscipit. Duis varius tincidunt eleifend. Quisque mattis eleifend ante eget porta. Nam libero metus, auctor fermentum pellentesque vitae, aliquet in nibh. Nunc ut hendrerit augue, vel interdum nibh. Aliquam convallis, dolor et iaculis luctus, mi massa cursus dui, sit amet malesuada lorem dui pharetra velit.</text:p>
      <text:p text:style-name="P3"/>
      <text:p text:style-name="P3">Duis pulvinar sit amet felis et porttitor. Vestibulum sed varius quam, a consectetur est. Donec lobortis nisi nulla, eu dignissim leo blandit non. Integer consequat egestas orci ac sodales. Maecenas non mauris dolor. Curabitur mollis mollis nibh facilisis tristique. Praesent aliquet orci in tortor rutrum mattis. Sed ac velit dolor. Donec aliquet imperdiet massa, eu feugiat enim tempor nec. Maecenas feugiat mi nec nisl laoreet tristique.</text:p>
      <text:p text:style-name="P3"/>
      <text:p text:style-name="P3">Aenean ut scelerisque velit. Proin vulputate felis sed condimentum gravida. Nunc euismod, dolor ut ultricies feugiat, nisi sem dapibus dui, quis interdum lacus lectus in ante. Aenean lectus dui, egestas et enim ac, imperdiet tincidunt velit. Quisque tincidunt erat vitae massa rhoncus sodales eu nec felis. Duis ut ipsum urna. Sed vulputate, mauris a maximus scelerisque, lacus felis venenatis ligula, eu fermentum sapien ligula at tellus. In mollis turpis tempus lorem tempus sagittis. Quisque et ultricies turpis. Vivamus non viverra sem. Aliquam porttitor tempus nisl at dignissim. Morbi convallis massa ligula, vitae facilisis mi tempor ac. Mauris ac consectetur ligula.</text:p>
      <text:p text:style-name="P3"/>
      <text:p text:style-name="P3">Phasellus eu neque quis nulla tempor ultrices bibendum ut tellus. Maecenas nec lobortis nisi, ac placerat odio. Vestibulum eu lectus ac felis dignissim scelerisque tempor non purus. Sed scelerisque sed massa eget ornare. Curabitur suscipit mi eget odio rutrum, sed semper risus consectetur. Nam pharetra vulputate volutpat. Nunc aliquet rutrum suscipit. Integer lacus ante, aliquam ut mi sed, pellentesque laoreet nibh. Pellentesque nec luctus augue, at semper neque. Proin laoreet turpis id ipsum congue dignissim.</text:p>
      <text:p text:style-name="P3"/>
      <text:p text:style-name="P3">Sed malesuada consectetur elit. Mauris at nisl metus. Nulla ut lobortis metus. Fusce augue ipsum, maximus at sollicitudin ut, pretium non ligula. Praesent ultricies quam efficitur, cursus metus tincidunt, tempor ex. Interdum et malesuada fames ac ante ipsum primis in faucibus. Curabitur accumsan nisi odio, in lacinia turpis vulputate eu. Aenean dignissim, mi a vestibulum vestibulum, orci nisl pellentesque dolor, vitae sollicitudin est mi et tortor. Proin aliquet turpis leo, in semper nibh dignissim dictum. Quisque sollicitudin quam vel rutrum tristique. Nullam consequat ante ac ipsum scelerisque, et pellentesque velit volutpat. Integer accumsan aliquam imperdiet. Duis laoreet ac sapien sit amet euismod. Sed congue risus quis mi commodo, in blandit ex molestie.</text:p>
      <text:p text:style-name="P3"/>
      <text:p text:style-name="P3">Aliquam congue libero non pellentesque pretium. Quisque lorem ipsum, fermentum a molestie id, malesuada vitae odio. Lorem ipsum dolor sit amet, consectetur adipiscing elit. Sed iaculis, purus sed pharetra dictum, lectus lectus pellentesque odio, sed cursus diam purus porta sapien. Fusce placerat lorem vitae lobortis luctus. Interdum et malesuada fames ac ante ipsum primis in faucibus. Integer tellus turpis, accumsan iaculis malesuada in, imperdiet vel enim.</text:p>
      <text:p text:style-name="P3"/>
      <text:p text:style-name="P3"><text:soft-page-break/>Suspendisse potenti. Proin facilisis at lectus nec molestie. Cras mattis auctor odio, id tristique lacus posuere quis. Nam nec congue massa, at tincidunt dolor. Aenean pulvinar venenatis velit. Sed lacus erat, gravida sit amet accumsan sed, feugiat eget nibh. Phasellus ligula nulla, feugiat eu eros at, molestie tincidunt massa. Duis efficitur egestas dolor vel dignissim. Curabitur quis bibendum orci. Vestibulum ante ipsum primis in faucibus orci luctus et ultrices posuere cubilia curae; Nam purus neque, iaculis a quam vitae, euismod tempor lorem. Mauris tincidunt magna eget purus tincidunt, a posuere risus fringilla. Duis non nulla vestibulum, tempor arcu scelerisque, lobortis augue. Ut dictum ultricies magna ac tempus. Phasellus fringilla accumsan quam, eget ultricies dui.</text:p>
      <text:p text:style-name="P3"/>
      <text:p text:style-name="P3">Morbi lorem diam, faucibus ut vestibulum eu, semper quis dolor. Mauris commodo varius lorem, eget gravida leo imperdiet non. In feugiat ligula vulputate sodales mollis. Sed quis elit dui. Donec a arcu sit amet metus tempus interdum a quis augue. Nulla hendrerit lectus semper massa scelerisque, eu porta lacus cursus. Sed accumsan, magna a tincidunt gravida, ante urna aliquet mi, id ultricies neque velit at nibh. Sed imperdiet velit risus, quis sollicitudin augue tincidunt quis. Nulla facilisi.</text:p>
      <text:p text:style-name="P3"/>
      <text:p text:style-name="P3">Suspendisse mattis tincidunt diam sed semper. Interdum et malesuada fames ac ante ipsum primis in faucibus. Suspendisse finibus lectus dolor, sit amet semper erat lobortis vel. Sed vel malesuada neque. Cras pulvinar ac urna eu accumsan. In sed risus quis lacus maximus tristique quis nec orci. Aliquam porta purus non velit sodales molestie.</text:p>
      <text:p text:style-name="P3"/>
      <text:p text:style-name="P3">Donec urna leo, efficitur eget auctor vel, maximus vitae odio. Mauris dapibus justo lacus, et tincidunt massa placerat in. Integer at mi ultricies, pharetra ante eu, lobortis magna. Donec massa magna, euismod sit amet lectus quis, aliquam tincidunt leo. Vestibulum non aliquet velit, eget aliquam ipsum. Curabitur maximus euismod nisi quis vulputate. Etiam pellentesque lorem vel metus dignissim euismod. Praesent congue, tortor sed egestas vehicula, est ante maximus erat, eu rutrum nulla turpis sed nunc. Phasellus non nulla mauris. Aenean euismod, tellus ut pellentesque posuere, lacus nisi tincidunt elit, et iaculis ipsum dui eget tortor. Fusce felis magna, aliquam et posuere a, rutrum et purus. Donec gravida congue ante, non vehicula nibh porta vehicula. In hac habitasse platea dictumst. Proin eu tortor efficitur, pharetra massa sit amet, finibus arcu. Integer convallis quam ullamcorper erat ultrices ullamcorper. Suspendisse fermentum fringilla libero, ac semper diam sodales vel.</text:p>
      <text:p text:style-name="P3"/>
      <text:p text:style-name="P3">In convallis sed eros non ultricies. Donec dapibus libero ligula, ornare tempor nunc eleifend tempor. Aenean vel enim porta, feugiat quam ut, scelerisque elit. Proin eu ex sapien. Nam semper arcu at ultricies efficitur. Etiam iaculis risus et iaculis commodo. Integer bibendum sapien nisl, viverra fermentum ante molestie sodales. Nunc dolor ipsum, tincidunt ullamcorper dui id, tincidunt vestibulum nulla. Donec volutpat tellus in justo elementum lobortis. Pellentesque habitant morbi tristique senectus et netus et malesuada fames ac turpis egestas. Pellentesque tincidunt odio vel orci interdum interdum. Sed viverra scelerisque diam, non maximus tortor. Fusce euismod pellentesque pellentesque. Class aptent taciti sociosqu ad litora torquent per conubia nostra, per inceptos himenaeos. Vestibulum iaculis, lorem sed consectetur volutpat, nunc nibh porttitor felis, vel scelerisque nisl dui ut est. Mauris ac est sit amet diam elementum tempor.</text:p>
      <text:p text:style-name="P3"/>
      <text:p text:style-name="P3">Aliquam eget viverra enim. Phasellus accumsan, dui vitae condimentum cursus, diam ligula consectetur est, vel viverra odio purus non odio. Integer est enim, accumsan at pellentesque venenatis, aliquam in massa. Curabitur nulla mi, laoreet in mattis congue, iaculis in tortor. Morbi eu ipsum mauris. Fusce et fermentum felis. Suspendisse sagittis, tellus a iaculis hendrerit, mi arcu ornare lectus, sit amet viverra libero lacus ac libero. Duis auctor, dui ac posuere porttitor, velit nibh bibendum diam, in aliquet sem risus vel risus. Proin accumsan urna dolor, non cursus felis aliquam et. Aliquam sapien tellus, hendrerit quis elit ut, malesuada imperdiet lorem. Nulla vitae massa nec dui tincidunt ultricies id nec lacus. Nunc tempor luctus risus, eget pharetra neque vestibulum et. <text:soft-page-break/>Etiam ultrices tempus dolor a tincidunt. In hac habitasse platea dictumst. Aliquam hendrerit, felis ut efficitur tristique, lacus mi tempus lacus, eu vestibulum purus elit et libero.</text:p>
      <text:p text:style-name="P3"/>
      <text:p text:style-name="P3">Aenean blandit odio egestas elit dignissim euismod. Curabitur augue neque, sagittis nec vestibulum at, ultricies quis erat. Pellentesque fermentum odio sit amet dui porttitor mollis. Duis sapien lectus, blandit et efficitur et, dictum ac nulla. Sed nec ante quis erat bibendum dictum eget vitae nisl. Donec fermentum elit auctor dapibus consectetur. Maecenas eleifend, eros et gravida dapibus, magna orci vulputate mauris, sit amet semper ipsum eros a erat. Duis ut quam id nisl pulvinar varius. In vehicula iaculis aliquam. Donec lobortis vestibulum tellus ut porta. Sed commodo auctor turpis a consequat. Cras vel vulputate nulla. In hac habitasse platea dictumst. Duis pulvinar, urna et congue consequat, enim dui fringilla enim, id dignissim ante erat in nunc. Integer bibendum semper purus, eget molestie mi blandit eu. Nullam nibh nunc, porttitor quis maximus eget, imperdiet quis tellus.</text:p>
      <text:p text:style-name="P3"/>
      <text:p text:style-name="P3">Ut porttitor tellus nibh, eu ultrices nisl semper non. Pellentesque vulputate nunc tortor, in tincidunt augue accumsan et. Sed auctor vitae est non dignissim. Fusce non tristique est, quis porttitor elit. In sollicitudin metus tortor, non aliquam urna eleifend eget. In hac habitasse platea dictumst. Nunc nec lectus consectetur, fringilla massa vel, dapibus enim. Sed sollicitudin tortor sit amet dapibus bibendum. Vivamus sed varius libero, ac maximus justo. Sed sit amet metus eu urna auctor egestas in ac tellus. Nunc rutrum quis nisi sed dapibus. Fusce lobortis mi sed sagittis convallis. Proin venenatis gravida facilisis. Maecenas eros quam, feugiat eu aliquet nec, luctus sit amet quam. Nunc condimentum convallis libero, vel facilisis orci elementum et.</text:p>
      <text:p text:style-name="P3"/>
      <text:p text:style-name="P3">Duis ac massa sodales, cursus lacus eu, ultricies massa. Donec rhoncus turpis in vestibulum semper. Fusce ac ultricies quam, sit amet fermentum lectus. Aliquam mattis libero eu blandit sollicitudin. Maecenas blandit finibus purus id consectetur. Vivamus eget turpis congue, iaculis purus vitae, mattis nulla. Vestibulum nulla elit, cursus et maximus eget, dictum vel nunc. Vivamus id diam a est ultrices fermentum. Cras elementum, libero quis volutpat congue, elit nibh vulputate diam, nec consequat est augue ut augue. Quisque sollicitudin imperdiet felis in sodales.</text:p>
      <text:p text:style-name="P3"/>
      <text:p text:style-name="P3">Sed condimentum eget risus ac auctor. Aenean luctus ex sit amet nisl porttitor, hendrerit molestie ligula vestibulum. Vestibulum in vulputate nisl. Ut eu lorem in nisi ullamcorper tempus. In vitae risus vel justo dictum rutrum. Mauris feugiat euismod sapien. Duis id faucibus tellus. Cras aliquam finibus sodales. Proin pharetra at ex id interdum. Nulla tempor accumsan ante, sed elementum risus rhoncus quis. Donec eget leo nulla. Curabitur faucibus sit amet elit malesuada auctor. Donec a dolor nec nisl efficitur eleifend. Sed mollis malesuada mauris id ornare. Donec in diam non elit egestas consectetur in at massa. Duis efficitur tortor dolor, quis eleifend sem gravida non.</text:p>
      <text:p text:style-name="P3"/>
      <text:p text:style-name="P3">Integer risus libero, gravida vel auctor quis, commodo in nisi. Nullam vehicula nisi in dui tempor mattis. Nullam quis nunc est. Nunc massa sapien, congue varius molestie quis, mattis sed sapien. Nunc ac facilisis libero, eu fringilla risus. Aenean feugiat gravida metus. Curabitur non pretium quam.</text:p>
      <text:p text:style-name="P3"/>
      <text:p text:style-name="P3">Vestibulum commodo elit nec neque malesuada suscipit. Lorem ipsum dolor sit amet, consectetur adipiscing elit. Interdum et malesuada fames ac ante ipsum primis in faucibus. Fusce rhoncus leo ut mattis scelerisque. Maecenas elementum non nunc vel feugiat. Sed sit amet finibus mauris. Suspendisse ullamcorper nulla justo, ut pulvinar justo imperdiet in. Mauris sit amet fringilla justo, quis consequat mauris. Sed sagittis turpis at lectus placerat pharetra. Cras aliquet efficitur est, at aliquet elit sodales et. Nulla ac odio sodales sapien porttitor pharetra sit amet non mi.</text:p>
      <text:p text:style-name="P3"/>
      <text:p text:style-name="P3">Vestibulum blandit dictum mauris, id consequat sem dictum non. Sed condimentum pretium magna nec commodo. Etiam scelerisque tortor at enim venenatis consectetur. Nulla accumsan feugiat <text:soft-page-break/>dolor, non iaculis arcu rhoncus non. Nulla lacinia molestie est vitae vehicula. Mauris id mi enim. Curabitur a enim at tellus posuere sollicitudin. Sed varius, nisl rhoncus mollis consequat, risus diam gravida urna, vitae congue enim turpis ut orci. Donec dapibus aliquet fringilla.</text:p>
      <text:p text:style-name="P3"/>
      <text:p text:style-name="P3">Curabitur lectus eros, tristique ut felis at, tincidunt maximus purus. Pellentesque habitant morbi tristique senectus et netus et malesuada fames ac turpis egestas. Morbi lobortis a turpis et fermentum. Vestibulum ante ipsum primis in faucibus orci luctus et ultrices posuere cubilia curae; Cras vitae volutpat magna. Donec maximus faucibus justo ac volutpat. Integer congue cursus velit, et tincidunt arcu rutrum vel. Ut hendrerit gravida enim, eget iaculis lectus aliquet et. Nullam iaculis augue vitae felis tincidunt, et luctus lacus placerat. Etiam posuere a sem eget congue. Sed commodo tincidunt turpis, ac bibendum velit tempor ut. Sed lobortis hendrerit purus, suscipit tincidunt lorem condimentum egestas. Nunc hendrerit orci at nunc imperdiet rutrum. Integer pretium eleifend lorem ac eleifend.</text:p>
      <text:p text:style-name="P3"/>
      <text:p text:style-name="P3">Morbi et scelerisque lorem. Suspendisse ut lectus ut arcu posuere sollicitudin ac sit amet sem. Sed condimentum sollicitudin feugiat. Fusce scelerisque velit vitae lacus efficitur eleifend. Sed tempus ornare velit, id lobortis leo aliquet a. Sed luctus tempor dolor, at tincidunt quam imperdiet quis. Nulla est dui, feugiat at viverra ac, maximus ut arcu. Nam enim eros, consequat efficitur leo nec, imperdiet volutpat risus. Ut dolor elit, placerat vel urna ac, volutpat malesuada turpis. Pellentesque ante felis, varius sed est sed, aliquet eleifend elit. Fusce urna felis, lobortis vitae malesuada vestibulum, facilisis at purus. Mauris efficitur sagittis magna eu porttitor. Curabitur hendrerit augue quis quam rhoncus, sed eleifend risus tempus.</text:p>
      <text:p text:style-name="P3"/>
      <text:p text:style-name="P3">Nulla ut volutpat nisi. Curabitur sollicitudin sem mauris, in malesuada ante porttitor non. Nullam vel orci vehicula, lacinia lorem sit amet, pellentesque ligula. Class aptent taciti sociosqu ad litora torquent per conubia nostra, per inceptos himenaeos. In facilisis iaculis magna, ut elementum enim hendrerit sed. Aenean quis commodo mauris. Praesent congue aliquam pellentesque. Quisque dapibus placerat est. Etiam ornare lobortis ex. Duis nec diam non mi ullamcorper molestie.</text:p>
      <text:p text:style-name="P3"/>
      <text:p text:style-name="P3">Cras egestas facilisis feugiat. In cursus odio tortor, sed interdum metus porttitor a. Nullam vel metus ut lectus commodo condimentum. Suspendisse feugiat pretium congue. Class aptent taciti sociosqu ad litora torquent per conubia nostra, per inceptos himenaeos. Curabitur volutpat consequat justo ut tempor. Mauris ut egestas sapien, nec elementum est. Nunc efficitur vehicula luctus. Donec molestie lectus quis sapien commodo finibus. Sed faucibus facilisis tempor. Fusce vestibulum ante sed felis accumsan, a euismod tortor volutpat. Sed congue molestie ultricies. Nam ut tellus eget urna elementum pharetra. Mauris dignissim magna in tempus sollicitudin.</text:p>
      <text:p text:style-name="P3"/>
      <text:p text:style-name="P3">Praesent auctor justo vitae neque consequat, eu feugiat arcu mattis. Pellentesque dapibus nisl vitae neque tempor, nec finibus nisi aliquet. Quisque consectetur eros sit amet ligula aliquet, nec varius lectus facilisis. In a varius risus. Etiam id metus posuere, sagittis nisl eget, fermentum libero. Morbi nibh neque, ornare nec tempus sagittis, elementum dapibus est. Phasellus a ipsum sed dolor finibus finibus non at nisl. Nulla elit est, elementum et imperdiet eget, aliquam cursus sem. Nam sodales, risus ac facilisis molestie, eros nulla suscipit enim, quis mollis nisi sem eget tellus. Aliquam eget quam odio. Donec pulvinar, erat sed fringilla pretium, est nisi accumsan leo, non commodo sapien orci id tellus. Quisque convallis est vel risus faucibus venenatis. Pellentesque ut facilisis tortor, et aliquam augue. Morbi nec neque vel massa varius molestie. Donec elementum nulla non semper finibus.</text:p>
      <text:p text:style-name="P3"/>
      <text:p text:style-name="P3">Maecenas ac nisl id ex interdum rhoncus. Nunc pulvinar iaculis pharetra. Proin eget nisi non erat vulputate viverra. Nam pretium nisi quis felis varius, et malesuada sem consequat. Sed eu egestas neque, eu elementum nulla. Curabitur aliquam ipsum et dolor vehicula, eget pellentesque sapien pretium. Nulla hendrerit suscipit justo et vulputate.</text:p>
      <text:p text:style-name="P3"><text:soft-page-break/></text:p>
      <text:p text:style-name="P3">Nam accumsan in augue in pretium. Donec eu diam cursus, sodales lectus vitae, condimentum ex. Praesent sit amet mattis sem. Pellentesque interdum faucibus aliquam. Morbi urna elit, egestas euismod porta at, venenatis imperdiet arcu. Nunc quis enim orci. Nullam felis urna, pellentesque sit amet pretium a, ultricies ac nisi. In vulputate diam eu massa condimentum, at ornare ipsum interdum. Ut facilisis metus nibh, in pretium tortor pretium et. Integer eget massa dapibus, feugiat lorem at, pellentesque velit. Quisque velit turpis, rhoncus vitae tempus euismod, dapibus ac augue. Aenean ultricies sodales bibendum. Aenean lectus augue, luctus quis turpis et, pulvinar ornare nulla.</text:p>
      <text:p text:style-name="P3"/>
      <text:p text:style-name="P3">Maecenas malesuada lobortis sapien vitae consectetur. Integer commodo id magna ac eleifend. Maecenas eget magna non nisl congue finibus. Maecenas condimentum quis est sit amet porta. Phasellus hendrerit leo libero, a pulvinar elit mollis vitae. Ut rutrum volutpat diam, vel lacinia nunc eleifend lobortis. Sed nec mauris posuere, luctus ligula a, mattis tortor. Maecenas rutrum tincidunt congue. Quisque pretium nisi id nisi aliquet, et dignissim erat congue. Donec ultricies pharetra massa, id ultricies nisl venenatis nec. Proin pellentesque fermentum neque, quis efficitur lorem varius eget.</text:p>
      <text:p text:style-name="P3"/>
      <text:p text:style-name="P3">Fusce ornare iaculis neque. Nunc mi massa, sodales non ligula eget, laoreet placerat felis. Nam at libero a est tincidunt imperdiet et quis sem. Morbi eget iaculis nunc. Etiam at sapien at lectus venenatis porta quis id mi. Cras semper tellus magna, a tristique nunc hendrerit in. Nunc quis posuere leo, luctus mollis justo. Maecenas et arcu vel turpis mollis feugiat. Etiam posuere mi nec tortor laoreet tempor.</text:p>
      <text:p text:style-name="P3"/>
      <text:p text:style-name="P3">Vestibulum ut lorem vehicula, convallis metus ut, pretium magna. Morbi eu dapibus est. Cras eu est justo. Suspendisse pulvinar odio et justo condimentum elementum. Duis venenatis velit sem, quis sodales mauris molestie a. Mauris nunc mauris, pretium quis sagittis eu, accumsan quis nibh. Curabitur volutpat varius mauris, nec malesuada augue tincidunt vitae. Morbi sagittis sagittis augue, et laoreet lorem.</text:p>
      <text:p text:style-name="P3"/>
      <text:p text:style-name="P3">Aenean sollicitudin metus libero, in volutpat tortor laoreet nec. Cras at ligula nibh. Vivamus ullamcorper arcu vel sapien sollicitudin, vel maximus quam porta. Maecenas varius erat quam, non euismod urna ultrices vitae. Donec rutrum, nisl sit amet pretium convallis, lectus nulla elementum libero, ut malesuada lorem libero a sapien. Praesent accumsan vulputate dolor. Aenean lobortis erat dolor. Integer feugiat enim sem, ut condimentum mi consectetur ac. Quisque et tempus est, nec rutrum orci. Pellentesque quis pulvinar elit. Class aptent taciti sociosqu ad litora torquent per conubia nostra, per inceptos himenaeos. Morbi hendrerit tortor eleifend dolor lacinia, eu ornare eros ultrices. Ut laoreet dignissim scelerisque. Morbi id tempor ligula.</text:p>
      <text:p text:style-name="P3"/>
      <text:p text:style-name="P3">Nam eu velit a felis aliquam posuere. Mauris tincidunt tempor ante, non facilisis libero mollis vitae. Donec justo turpis, egestas tempus nibh at, lacinia mollis massa. In aliquam risus vitae nibh rhoncus, id egestas odio varius. Nullam vitae lorem sem. Proin at massa ac nisi tincidunt aliquam. Nullam tempor odio quis mattis pulvinar. Donec consequat egestas magna, eu vulputate ante consectetur id. Donec ut volutpat eros. Curabitur faucibus pretium quam, ut interdum tortor euismod a. Vivamus in posuere urna, mattis vulputate eros. Vestibulum ante ipsum primis in faucibus orci luctus et ultrices posuere cubilia curae; Fusce rutrum non justo dictum dictum.</text:p>
      <text:p text:style-name="P3"/>
      <text:p text:style-name="P3">Ut quis consequat mi, pharetra porttitor neque. Donec at semper diam, eget consectetur elit. Pellentesque auctor massa vitae hendrerit mollis. Nulla vel erat eu nulla dapibus commodo. Vivamus ac sem metus. Cras finibus mollis lorem. Integer vel lorem augue. Orci varius natoque penatibus et magnis dis parturient montes, nascetur ridiculus mus. Donec nec elementum sem. Phasellus facilisis gravida risus id porta. Ut venenatis velit dictum neque cursus, nec suscipit ante lacinia. Nunc mollis, enim eu laoreet aliquet, ante est dictum justo, porta vestibulum dui dui quis <text:soft-page-break/>mi. Aenean porttitor neque erat, a scelerisque orci elementum quis. Pellentesque ultrices neque nec lectus pulvinar tempus quis eget nibh. Fusce quis est rutrum, placerat leo eget, porttitor erat. Integer libero nulla, porttitor at efficitur lacinia, vestibulum eget sapien.</text:p>
      <text:p text:style-name="P3"/>
      <text:p text:style-name="P3">Etiam mattis laoreet mattis. Suspendisse scelerisque consectetur libero sed congue. Pellentesque habitant morbi tristique senectus et netus et malesuada fames ac turpis egestas. Nulla blandit sit amet nunc quis imperdiet. Pellentesque faucibus risus non augue mattis aliquam. Praesent quis augue gravida nisl consectetur semper eget at diam. Pellentesque vestibulum, nisl eget pulvinar pellentesque, libero velit lobortis felis, in cursus sem urna quis tellus. Vestibulum pellentesque nisi eget purus condimentum varius. Vestibulum felis sapien, ultricies non odio a, eleifend volutpat enim. Nam accumsan purus purus. Interdum et malesuada fames ac ante ipsum primis in faucibus.</text:p>
      <text:p text:style-name="P3"/>
      <text:p text:style-name="P3">Morbi fermentum aliquet dui, a vestibulum ligula tempus vel. Proin gravida, nunc a suscipit bibendum, nisl lectus hendrerit nibh, eget ultricies mi mi at enim. Maecenas vel sem laoreet, ultrices odio sit amet, lobortis orci. Lorem ipsum dolor sit amet, consectetur adipiscing elit. Vestibulum volutpat lacinia est egestas finibus. Vivamus vestibulum nibh vitae velit ullamcorper, id porta justo mollis. Vivamus ac tincidunt turpis, eu sollicitudin ligula. Nunc risus mauris, cursus tincidunt eros sed, sodales tincidunt elit.</text:p>
      <text:p text:style-name="P3"/>
      <text:p text:style-name="P3">Sed vel pretium nisl. Praesent semper ex a felis pellentesque, non sodales ligula lacinia. Aenean massa ex, interdum eget lacus vel, molestie scelerisque ligula. Duis auctor auctor velit, a tincidunt orci accumsan in. Ut ac risus id sapien sagittis tristique et ut orci. Quisque iaculis nisi non mauris congue elementum. Sed id tempor arcu, at feugiat sapien. Donec euismod, tortor vel congue ornare, ex purus congue mauris, in feugiat tellus odio eget leo. Suspendisse ultrices iaculis orci eu luctus. Etiam augue odio, congue a libero nec, feugiat ornare risus. Quisque a sem vel massa luctus scelerisque ac eget enim.</text:p>
      <text:p text:style-name="P3"/>
      <text:p text:style-name="P3">Praesent euismod lacus non tincidunt facilisis. Phasellus pulvinar in sapien non luctus. Nulla facilisi. Cras vel nisl ultrices, feugiat purus vel, facilisis quam. Curabitur fermentum euismod arcu, ut dictum ex dictum pharetra. Phasellus quis enim id ligula suscipit efficitur. Maecenas ac tempor leo. Proin ac gravida nibh. Etiam bibendum at eros id dignissim. Nullam sem lectus, laoreet sit amet ultrices in, rhoncus nec diam. Maecenas aliquam varius velit quis fringilla.</text:p>
      <text:p text:style-name="P3"/>
      <text:p text:style-name="P3">Donec commodo augue eget rhoncus facilisis. Nullam mi turpis, viverra et tempor id, venenatis ac urna. Pellentesque a nulla augue. In accumsan fringilla dolor non tristique. Quisque quis mauris non nulla finibus aliquam. Etiam vitae tempor nibh, in tristique est. Aliquam sapien dolor, scelerisque et lectus vel, fringilla auctor mauris. Nunc odio lacus, imperdiet quis sodales a, molestie ut mauris. Quisque bibendum, metus ullamcorper facilisis rutrum, eros ex iaculis arcu, eu cursus libero mauris eget nulla.</text:p>
      <text:p text:style-name="P3"/>
      <text:p text:style-name="P3">Phasellus eget efficitur lacus, id convallis justo. Aliquam commodo iaculis risus id ultricies. Sed porta libero at nisi ultricies euismod. Integer arcu mauris, fermentum eget luctus quis, suscipit a massa. Quisque auctor rhoncus mauris in ultricies. Aliquam orci turpis, sollicitudin in bibendum non, placerat et eros. Donec eget fermentum augue, mollis scelerisque neque. Cras condimentum nulla eget mauris elementum, non mollis metus tincidunt. Curabitur at ultricies justo. Nam lacinia felis ac mi semper maximus. Etiam porttitor eu nulla accumsan blandit. Quisque at ipsum mollis nisl mattis congue quis eu felis. Curabitur vitae vulputate quam.</text:p>
      <text:p text:style-name="P3"/>
      <text:p text:style-name="P3">Fusce et tellus ultrices, vehicula sem vitae, tincidunt ipsum. Vestibulum dolor lorem, blandit id dolor a, porttitor pellentesque ligula. Ut condimentum eros id lorem finibus posuere. In nunc turpis, fermentum nec neque ac, tincidunt egestas dui. Duis pretium felis non tristique euismod. Cras <text:soft-page-break/>rhoncus aliquam ipsum vitae ornare. Suspendisse id gravida nulla. Vestibulum eleifend metus suscipit maximus commodo.</text:p>
      <text:p text:style-name="P3"/>
      <text:p text:style-name="P3">Quisque varius et mi nec dignissim. Quisque tristique nisl ac dui laoreet, sed vestibulum dui euismod. Sed ut sem eu magna suscipit molestie. Morbi consectetur nisi vel quam lacinia tincidunt. Vestibulum sed diam ut dui ultrices porttitor vitae ut dolor. Proin condimentum suscipit leo id maximus. Aliquam erat volutpat. Aliquam eget fermentum metus. Class aptent taciti sociosqu ad litora torquent per conubia nostra, per inceptos himenaeos. Sed in euismod nisl. Quisque sed dictum purus. Duis interdum non purus sed dictum. Nam ligula ante, fringilla sed blandit ac, vulputate id quam. Sed finibus gravida ipsum auctor posuere. Cras eget quam et ipsum cursus gravida non vel arcu.</text:p>
      <text:p text:style-name="P3"/>
      <text:p text:style-name="P3">Donec non lacus est. Nam tempor velit ac arcu pulvinar pulvinar. Morbi ac dui non neque ultricies fermentum. Aenean lacinia, nunc quis varius tempor, est ex accumsan lacus, eget eleifend neque lacus ut felis. Fusce magna velit, sollicitudin vel tincidunt in, luctus ut urna. Nulla interdum egestas mauris eget efficitur. Nunc id sem nunc. Curabitur at mi tellus. Aliquam ac convallis ante, eu venenatis nibh. Nullam pulvinar arcu et mauris cursus, sed iaculis metus ornare.</text:p>
      <text:p text:style-name="P3"/>
      <text:p text:style-name="P3">Aliquam ac lobortis neque. Sed eget dictum massa. Ut nec dictum sem. Ut dolor ligula, sagittis eget sapien at, vehicula porttitor dolor. Cras sollicitudin sit amet lectus at viverra. Nunc scelerisque nisi ex, eget semper nulla pharetra et. Aenean orci magna, consequat ac tincidunt eu, lobortis at eros. Nunc vehicula mollis nisl accumsan feugiat. In tristique laoreet felis, quis ultrices massa sagittis tempus.</text:p>
      <text:p text:style-name="P3"/>
      <text:p text:style-name="P3">Ut vitae nisi purus. Sed convallis lectus ut nulla euismod finibus. Phasellus pellentesque odio a dolor pulvinar, et volutpat mauris fringilla. Sed eget turpis posuere odio mollis tempus ac eu libero. Fusce eget est non justo mattis iaculis sed a nisl. Duis lacinia quis nibh sed fermentum. Vivamus consequat consectetur dolor, nec cursus erat consequat quis. Nam pharetra tincidunt posuere. Sed in felis bibendum, accumsan tortor a, porttitor justo. Maecenas viverra sagittis nisi, quis pellentesque purus faucibus nec. Curabitur eget nisl placerat, vulputate augue ac, consequat massa.</text:p>
      <text:p text:style-name="P3"/>
      <text:p text:style-name="P3">Aenean congue rutrum mi eget egestas. Duis efficitur pharetra orci, non ornare elit viverra id. Cras elementum dapibus dui nec rhoncus. Fusce sollicitudin fringilla porttitor. Fusce ut enim non mi sagittis congue. Nam odio ligula, tincidunt eu viverra viverra, volutpat eget mauris. Fusce mattis pellentesque vehicula. Praesent id lorem sed ante feugiat faucibus. Nam tristique hendrerit nisi quis imperdiet. Curabitur suscipit metus ante, a aliquet quam consequat a. Aliquam ac dictum augue, sed posuere purus. Curabitur suscipit varius diam vitae efficitur.</text:p>
      <text:p text:style-name="P3"/>
      <text:p text:style-name="P3">Nulla nisi nisi, suscipit quis felis sed, faucibus ullamcorper justo. Mauris ligula urna, vulputate eu nunc sed, interdum dignissim diam. Mauris tempor quam sit amet dui tristique, non porta orci malesuada. Aliquam orci tortor, feugiat id volutpat vel, tempus a ante. Phasellus at leo vel lacus egestas tempor eget eu eros. Sed fringilla, erat non volutpat ullamcorper, metus eros scelerisque libero, tristique rutrum libero lorem tempor odio. Aenean consequat justo lacus, eget auctor augue finibus sed. Mauris euismod placerat sapien sit amet ullamcorper. Praesent at rhoncus sapien. Aliquam erat volutpat. In molestie porttitor vestibulum. Nam id nulla at ex convallis vestibulum tempor a purus. Fusce interdum mauris blandit sem faucibus, at pharetra metus imperdiet.</text:p>
      <text:p text:style-name="P3"/>
      <text:p text:style-name="P3">Sed arcu elit, tempus nec magna vel, ultrices tristique turpis. Integer at mauris sit amet dui iaculis suscipit id sed odio. Sed eros justo, sagittis et laoreet ac, iaculis at eros. Cras pharetra, augue in luctus eleifend, sem tellus maximus diam, at maximus enim dui et mi. Vivamus quis feugiat est. Proin ut convallis nisl. Mauris viverra a dolor vel porttitor. Sed in viverra libero, ut luctus mi. Maecenas condimentum vehicula odio, in molestie urna egestas eget. Quisque bibendum <text:soft-page-break/>scelerisque suscipit. Nulla quis sem ut neque fermentum interdum in in sapien. Sed accumsan, velit id mollis tempus, risus nunc accumsan sapien, sed egestas tortor lectus at eros.</text:p>
      <text:p text:style-name="P3"/>
      <text:p text:style-name="P3">Pellentesque sed nisl velit. Donec convallis nunc varius dui porta tincidunt. Phasellus blandit lorem velit, at pharetra tortor malesuada in. Fusce tristique venenatis enim, eu semper dolor facilisis nec. Vivamus sit amet erat quam. Curabitur id finibus tellus. In id interdum arcu. Ut interdum consectetur scelerisque. Phasellus egestas dolor enim, et faucibus sapien imperdiet sed. Cras aliquam at enim pharetra pharetra. Donec vulputate id nulla in rutrum. Sed lacinia ex in justo fringilla, ac porta nisi fermentum.</text:p>
      <text:p text:style-name="P3"/>
      <text:p text:style-name="P3">Duis porta posuere tristique. Vestibulum sit amet risus gravida, ornare nunc quis, pulvinar risus. Phasellus a vehicula mauris, quis imperdiet nibh. Aenean ligula libero, iaculis ut nunc placerat, convallis hendrerit orci. Nullam cursus finibus massa volutpat tincidunt. Sed eget vulputate ipsum, venenatis maximus arcu. Proin egestas rutrum accumsan.</text:p>
      <text:p text:style-name="P3"/>
      <text:p text:style-name="P3">Nullam semper neque quis nunc malesuada laoreet. Aliquam sed eros fringilla, varius nunc at, porttitor mi. Morbi convallis magna a ullamcorper molestie. Aenean a quam nisi. Suspendisse egestas id leo nec lobortis. Aliquam at neque malesuada, egestas elit in, sagittis leo. Interdum et malesuada fames ac ante ipsum primis in faucibus. Sed fringilla vehicula libero non convallis. Mauris eleifend lacinia magna et tempus. Suspendisse sed feugiat elit. Curabitur sagittis ipsum eu odio sagittis porta. Pellentesque ut massa ac turpis ullamcorper iaculis. Sed gravida arcu faucibus cursus sollicitudin.</text:p>
      <text:p text:style-name="P3"/>
      <text:p text:style-name="P3">Pellentesque a hendrerit purus, sed rhoncus arcu. Suspendisse eu viverra lectus, at gravida lorem. Quisque pharetra, eros ac vulputate gravida, est diam interdum nisi, vel condimentum leo ipsum id nibh. Morbi fermentum ante eget neque eleifend, id elementum risus accumsan. Nullam consequat massa lorem, vitae fermentum augue faucibus ac. Integer nunc leo, vestibulum non interdum id, egestas vel sem. Nulla aliquet erat ac massa feugiat, nec varius massa pharetra. Nullam scelerisque ornare purus, vitae convallis eros congue at. Aliquam erat volutpat. Sed molestie nec odio quis semper. Mauris auctor arcu quis felis consequat, non viverra sapien ornare. Donec id mauris volutpat, mattis turpis eu, accumsan odio. Mauris rutrum velit arcu, sed vestibulum elit dictum id. In hac habitasse platea dictumst. Donec iaculis arcu et tortor viverra, ut congue ligula iaculis.</text:p>
      <text:p text:style-name="P3"/>
      <text:p text:style-name="P3">Sed et lectus ac ligula tempus euismod ut vitae nulla. Phasellus eget auctor ante. Suspendisse ultrices aliquet egestas. Quisque facilisis rutrum facilisis. Vestibulum ex nulla, condimentum eget quam et, iaculis rutrum nibh. Praesent sollicitudin purus a tellus interdum, id vehicula leo egestas. Nullam maximus ligula pulvinar sapien porttitor, et finibus lorem vehicula. Duis luctus hendrerit leo et consequat. Vestibulum vitae ante risus. Donec feugiat turpis sed massa rutrum, at sagittis turpis faucibus. Vivamus ultrices tristique lobortis. Nulla aliquam elit non cursus lacinia. Proin eu vulputate mi. Duis nisi justo, imperdiet sed augue ut, blandit tincidunt massa. Sed convallis enim id magna gravida, at aliquet nibh dignissim. Cras varius libero id ex efficitur sodales.</text:p>
      <text:p text:style-name="P3"/>
      <text:p text:style-name="P3">Sed aliquet faucibus vehicula. Mauris non lobortis libero. Vestibulum lacinia enim vel metus tincidunt, nec mattis ipsum euismod. Etiam semper posuere imperdiet. Donec id luctus arcu. Nunc ut lectus nec nibh malesuada gravida ac ac ante. Nullam nec tortor quam. Etiam nec turpis non mi semper elementum at quis nibh. Quisque eu posuere nisl, id porta odio. Aliquam hendrerit metus ut purus vestibulum, non condimentum felis facilisis. Praesent sollicitudin, ante eget congue aliquet, nibh massa iaculis urna, vel imperdiet dui justo egestas sapien. Phasellus egestas velit in egestas vehicula. Sed fermentum turpis nisi, non laoreet augue consequat id. Vestibulum eu bibendum risus. Pellentesque pretium rutrum suscipit.</text:p>
      <text:p text:style-name="P3"/>
      <text:p text:style-name="P3"><text:soft-page-break/>Donec tempus dui at justo ullamcorper, quis sodales quam ullamcorper. Nulla venenatis, nisi et consectetur hendrerit, arcu ante ullamcorper metus, vitae blandit enim nisl et arcu. Cras egestas lacus justo, eget placerat risus porttitor et. Proin magna dolor, aliquet sed efficitur in, fringilla sit amet ligula. Nam et viverra diam, ut efficitur velit. Quisque enim mauris, ornare eu rhoncus ut, feugiat nec lacus. In semper turpis aliquet, suscipit tellus a, accumsan leo. Cras eu arcu eget massa vestibulum bibendum. Nunc ac faucibus est. Nulla euismod maximus ipsum, quis ornare felis fringilla vitae.</text:p>
      <text:p text:style-name="P3"/>
      <text:p text:style-name="P4"><text:span text:style-name="T2">Aenean rhoncus nec metus aliquam porta. Aliquam in felis id est porta venenatis id non mi. Nunc congue risus libero, eget congue velit hendrerit vel. Integer non venenatis erat. Mauris non dui sit amet risus ornare luctus. Maecenas lacinia felis eu ante ultricies, vitae pulvinar magna malesuada. Morbi sagittis magna id posuere rutrum. Aliquam ac dui ligula. Aliquam erat volutpat. Vestibulum auctor cursus accumsan. Praesent ultricies ex sed maximus mattis. Nulla vitae viverra ex, vel bibendum mauris. Fusce rhoncus eget dui ut dictum. Curabitur non vestibulum est. Nunc est justo, porttitor id rhoncus nec, commodo volutpat mass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6T10:04:55.879481700</meta:creation-date>
    <dc:date>2026-05-16T10:10:39.387153500</dc:date>
    <meta:editing-duration>PT5M29S</meta:editing-duration>
    <meta:editing-cycles>3</meta:editing-cycles>
    <meta:generator>LibreOffice/25.8.5.2$Windows_X86_64 LibreOffice_project/9c8b85f387cc00a89945a79c9e6239f32e450ac2</meta:generator>
    <meta:document-statistic meta:table-count="0" meta:image-count="0" meta:object-count="0" meta:page-count="20" meta:paragraph-count="127" meta:word-count="11855" meta:character-count="79901" meta:non-whitespace-character-count="68171"/>
  </office:meta>
</office:document-meta>
</file>